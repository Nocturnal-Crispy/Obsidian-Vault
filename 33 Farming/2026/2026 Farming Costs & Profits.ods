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2.362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Title" style:family="table-cell" style:parent-style-name="Default">
      <style:text-properties fo:color="#1f3864" fo:font-size="15pt" fo:font-weight="bold"/>
    </style:style>
    <style:style style:name="ceSub" style:family="table-cell" style:parent-style-name="Default">
      <style:text-properties fo:color="#44546a" fo:font-size="11pt" fo:font-weight="bold"/>
    </style:style>
    <style:style style:name="ceNote" style:family="table-cell" style:parent-style-name="Default">
      <style:text-properties fo:color="#808080" fo:font-size="9pt" fo:font-style="italic"/>
    </style:style>
    <style:style style:name="ceHeadL" style:family="table-cell" style:parent-style-name="Default">
      <style:table-cell-properties fo:background-color="#305496" fo:border="0.51pt solid #ffffff"/>
      <style:text-properties fo:color="#ffffff" fo:font-weight="bold"/>
    </style:style>
    <style:style style:name="ceSection" style:family="table-cell" style:parent-style-name="Default">
      <style:table-cell-properties fo:border-bottom="0.51pt solid #8ea9db" fo:background-color="#d9e1f2" fo:border-left="none" fo:border-right="none" fo:border-top="0.51pt solid #8ea9db"/>
      <style:text-properties fo:color="#1f3864" fo:font-weight="bold"/>
    </style:style>
    <style:style style:name="ceLabelBold" style:family="table-cell" style:parent-style-name="Default">
      <style:text-properties fo:font-weight="bold"/>
    </style:style>
    <style:style style:name="ceLabelNet" style:family="table-cell" style:parent-style-name="Default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Head" style:family="table-cell" style:parent-style-name="Default">
      <style:table-cell-properties fo:background-color="#305496" style:text-align-source="fix" style:repeat-content="false" fo:border="0.51pt solid #ffffff" style:vertical-align="middle"/>
      <style:paragraph-properties fo:text-align="center"/>
      <style:text-properties fo:color="#ffffff" fo:font-weight="bold"/>
    </style:style>
    <style:style style:name="ceNumInput" style:family="table-cell" style:parent-style-name="Default" style:data-style-name="N4">
      <style:table-cell-properties fo:background-color="#fff2cc" fo:border="0.51pt solid #d6b656"/>
    </style:style>
    <style:style style:name="ceCur" style:family="table-cell" style:parent-style-name="Default" style:data-style-name="N130"/>
    <style:style style:name="ceCurInput" style:family="table-cell" style:parent-style-name="Default" style:data-style-name="N130">
      <style:table-cell-properties fo:background-color="#fff2cc" fo:border="0.51pt solid #d6b656"/>
    </style:style>
    <style:style style:name="ceCurTotal" style:family="table-cell" style:parent-style-name="Default" style:data-style-name="N130">
      <style:table-cell-properties fo:border-bottom="none" fo:border-left="none" fo:border-right="none" fo:border-top="0.51pt solid #404040"/>
      <style:text-properties fo:font-weight="bold"/>
    </style:style>
    <style:style style:name="ceCurNet" style:family="table-cell" style:parent-style-name="Default" style:data-style-name="N130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NumTotal" style:family="table-cell" style:parent-style-name="Default" style:data-style-name="N4">
      <style:text-properties fo:font-weight="bold"/>
    </style:style>
    <style:style style:name="ceCurTotalLite" style:family="table-cell" style:parent-style-name="Default" style:data-style-name="N130">
      <style:text-properties fo:font-weight="bold"/>
    </style:style>
    <style:style style:name="ceDateInput" style:family="table-cell" style:parent-style-name="Default" style:data-style-name="N49">
      <style:table-cell-properties fo:background-color="#fff2cc" fo:border="0.51pt solid #d6b656"/>
    </style:style>
    <style:style style:name="ce17" style:family="table-cell" style:parent-style-name="Default">
      <style:table-cell-properties fo:background-color="#fff2cc" fo:border="0.51pt solid #d6b656"/>
    </style:style>
    <style:style style:name="ceTextInput" style:family="table-cell" style:parent-style-name="Default">
      <style:table-cell-properties fo:background-color="#fff2cc" fo:border="0.51pt solid #d6b656"/>
    </style:style>
    <style:style style:name="cePct" style:family="table-cell" style:parent-style-name="Default" style:data-style-name="N131">
      <style:text-properties fo:font-weight="bold"/>
    </style:style>
    <style:style style:name="ceNum" style:family="table-cell" style:parent-style-name="Default" style:data-style-name="N4"/>
  </office:automatic-styles>
  <office:body>
    <office:spreadsheet>
      <table:calculation-settings table:automatic-find-labels="false"/>
      <table:content-validations>
        <table:content-validation table:name="val1" table:condition="of:cell-content-is-in-list([$'P&amp;L'.B5:.D5])" table:allow-empty-cell="true" table:display-list="unsorted" table:base-cell-address="'P&amp;L'.A1"/>
        <table:content-validation table:name="val2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 table:base-cell-address="'P&amp;L'.A1"/>
      </table:content-validations>
      <table:table table:name="P&amp;L" table:style-name="ta1">
        <table:table-column table:style-name="co1" table:default-cell-style-name="Default"/>
        <table:table-column table:style-name="co2" table:number-columns-repeated="3" table:default-cell-style-name="ceCur"/>
        <table:table-column table:style-name="co2" table:default-cell-style-name="ceCurTotalLite"/>
        <table:table-row table:style-name="ro1">
          <table:table-cell table:style-name="ceTitle" office:value-type="string" calcext:value-type="string" table:number-columns-spanned="5" table:number-rows-spanned="1">
            <text:p>2026 Farming Ventures — Costs &amp; Profits</text:p>
          </table:table-cell>
          <table:covered-table-cell table:number-columns-repeated="4" table:style-name="Default"/>
        </table:table-row>
        <table:table-row table:style-name="ro2">
          <table:table-cell table:style-name="ceSub" office:value-type="string" calcext:value-type="string" table:number-columns-spanned="5" table:number-rows-spanned="1">
            <text:p>Income Statement (P&amp;L) <text:s text:c="2"/>• <text:s text:c="2"/>Season 2026</text:p>
          </table:table-cell>
          <table:covered-table-cell table:number-columns-repeated="4" table:style-name="Default"/>
        </table:table-row>
        <table:table-row table:style-name="ro3">
          <table:table-cell table:style-name="ceNote" office:value-type="string" calcext:value-type="string" table:number-columns-spanned="5" table:number-rows-spanned="1">
            <text:p>Yellow = type here. <text:s/>White = auto-calculated. <text:s/>Crop sales pull from the Sales tab; expense lines pull from the Expenses tab. Rename Crop 2 / Crop 3 below and pick the same names in the logs.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HeadL" office:value-type="string" calcext:value-type="string">
            <text:p>ITEM</text:p>
          </table:table-cell>
          <table:table-cell table:style-name="ceHead" office:value-type="string" calcext:value-type="string">
            <text:p>Soybeans</text:p>
          </table:table-cell>
          <table:table-cell table:style-name="ceHead" office:value-type="string" calcext:value-type="string">
            <text:p>Crop 2</text:p>
          </table:table-cell>
          <table:table-cell table:style-name="ceHead" office:value-type="string" calcext:value-type="string">
            <text:p>Crop 3</text:p>
          </table:table-cell>
          <table:table-cell table:style-name="ceHead" office:value-type="string" calcext:value-type="string">
            <text:p>TOTAL (all crops)</text:p>
          </table:table-cell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ON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Acres planted</text:p>
          </table:table-cell>
          <table:table-cell table:style-name="ceNumInput" table:number-columns-repeated="3"/>
          <table:table-cell table:style-name="ceNumTotal" table:formula="of:=SUM([.B7:.D7])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Total production (units harvested)</text:p>
          </table:table-cell>
          <table:table-cell table:style-name="ceNumInput" table:number-columns-repeated="3"/>
          <table:table-cell table:style-name="ceNumTotal" table:formula="of:=SUM([.B8:.D8])" office:value-type="float" office:value="0" calcext:value-type="float">
            <text:p>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REVENUE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Crop sales <text:s/>(from Sales tab)</text:p>
          </table:table-cell>
          <table:table-cell table:formula="of:=SUMIF([$Sales.B3:.B62];[.B5];[$Sales.F3:.F62])" office:value-type="currency" office:currency="USD" office:value="0" calcext:value-type="currency">
            <text:p>$0.00</text:p>
          </table:table-cell>
          <table:table-cell table:formula="of:=SUMIF([$Sales.B3:.B62];[.C5];[$Sales.F3:.F62])" office:value-type="currency" office:currency="USD" office:value="0" calcext:value-type="currency">
            <text:p>$0.00</text:p>
          </table:table-cell>
          <table:table-cell table:formula="of:=SUMIF([$Sales.B3:.B62];[.D5];[$Sales.F3:.F62])" office:value-type="currency" office:currency="USD" office:value="0" calcext:value-type="currency">
            <text:p>$0.00</text:p>
          </table:table-cell>
          <table:table-cell table:formula="of:=SUM([.B11:.D11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overnment payments</text:p>
          </table:table-cell>
          <table:table-cell table:style-name="ceCurInput" table:number-columns-repeated="3"/>
          <table:table-cell table:formula="of:=SUM([.B12:.D1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oceeds</text:p>
          </table:table-cell>
          <table:table-cell table:style-name="ceCurInput" table:number-columns-repeated="3"/>
          <table:table-cell table:formula="of:=SUM([.B13:.D13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farm income</text:p>
          </table:table-cell>
          <table:table-cell table:style-name="ceCurInput" table:number-columns-repeated="3"/>
          <table:table-cell table:formula="of:=SUM([.B14:.D14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REVENUE</text:p>
          </table:table-cell>
          <table:table-cell table:style-name="ceCurTotal" table:formula="of:=SUM([.B11:.B14])" office:value-type="currency" office:currency="USD" office:value="0" calcext:value-type="currency">
            <text:p>$0.00</text:p>
          </table:table-cell>
          <table:table-cell table:style-name="ceCurTotal" table:formula="of:=SUM([.C11:.C14])" office:value-type="currency" office:currency="USD" office:value="0" calcext:value-type="currency">
            <text:p>$0.00</text:p>
          </table:table-cell>
          <table:table-cell table:style-name="ceCurTotal" table:formula="of:=SUM([.D11:.D14])" office:value-type="currency" office:currency="USD" office:value="0" calcext:value-type="currency">
            <text:p>$0.00</text:p>
          </table:table-cell>
          <table:table-cell table:style-name="ceCurTotal" table:formula="of:=SUM([.B15:.D15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OPERATING (VARIABLE)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Seed</text:p>
          </table:table-cell>
          <table:table-cell table:formula="of:=SUMIFS([$Expenses.E3:.E82];[$Expenses.C3:.C82];[.A1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D5])" office:value-type="currency" office:currency="USD" office:value="0" calcext:value-type="currency">
            <text:p>$0.00</text:p>
          </table:table-cell>
          <table:table-cell table:formula="of:=SUMIF([$Expenses.C3:.C82];[.A18];[$Expenses.E3:.E82])" office:value-type="currency" office:currency="USD" office:value="2050" calcext:value-type="currency">
            <text:p>$2,050.00</text:p>
          </table:table-cell>
        </table:table-row>
        <table:table-row table:style-name="ro3">
          <table:table-cell office:value-type="string" calcext:value-type="string">
            <text:p>Fertilizer &amp; lime</text:p>
          </table:table-cell>
          <table:table-cell table:formula="of:=SUMIFS([$Expenses.E3:.E82];[$Expenses.C3:.C82];[.A1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D5])" office:value-type="currency" office:currency="USD" office:value="0" calcext:value-type="currency">
            <text:p>$0.00</text:p>
          </table:table-cell>
          <table:table-cell table:formula="of:=SUMIF([$Expenses.C3:.C82];[.A1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hemicals (herbicide / pesticide)</text:p>
          </table:table-cell>
          <table:table-cell table:formula="of:=SUMIFS([$Expenses.E3:.E82];[$Expenses.C3:.C82];[.A2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D5])" office:value-type="currency" office:currency="USD" office:value="0" calcext:value-type="currency">
            <text:p>$0.00</text:p>
          </table:table-cell>
          <table:table-cell table:formula="of:=SUMIF([$Expenses.C3:.C82];[.A2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emiums</text:p>
          </table:table-cell>
          <table:table-cell table:formula="of:=SUMIFS([$Expenses.E3:.E82];[$Expenses.C3:.C82];[.A21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D5])" office:value-type="currency" office:currency="USD" office:value="0" calcext:value-type="currency">
            <text:p>$0.00</text:p>
          </table:table-cell>
          <table:table-cell table:formula="of:=SUMIF([$Expenses.C3:.C82];[.A21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uel &amp; oil</text:p>
          </table:table-cell>
          <table:table-cell table:formula="of:=SUMIFS([$Expenses.E3:.E82];[$Expenses.C3:.C82];[.A22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D5])" office:value-type="currency" office:currency="USD" office:value="0" calcext:value-type="currency">
            <text:p>$0.00</text:p>
          </table:table-cell>
          <table:table-cell table:formula="of:=SUMIF([$Expenses.C3:.C82];[.A22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ustom hire / machine work</text:p>
          </table:table-cell>
          <table:table-cell table:formula="of:=SUMIFS([$Expenses.E3:.E82];[$Expenses.C3:.C82];[.A23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D5])" office:value-type="currency" office:currency="USD" office:value="0" calcext:value-type="currency">
            <text:p>$0.00</text:p>
          </table:table-cell>
          <table:table-cell table:formula="of:=SUMIF([$Expenses.C3:.C82];[.A23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formula="of:=SUMIFS([$Expenses.E3:.E82];[$Expenses.C3:.C82];[.A24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D5])" office:value-type="currency" office:currency="USD" office:value="0" calcext:value-type="currency">
            <text:p>$0.00</text:p>
          </table:table-cell>
          <table:table-cell table:formula="of:=SUMIF([$Expenses.C3:.C82];[.A24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rying &amp; storage</text:p>
          </table:table-cell>
          <table:table-cell table:formula="of:=SUMIFS([$Expenses.E3:.E82];[$Expenses.C3:.C82];[.A25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D5])" office:value-type="currency" office:currency="USD" office:value="0" calcext:value-type="currency">
            <text:p>$0.00</text:p>
          </table:table-cell>
          <table:table-cell table:formula="of:=SUMIF([$Expenses.C3:.C82];[.A25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auling / trucking</text:p>
          </table:table-cell>
          <table:table-cell table:formula="of:=SUMIFS([$Expenses.E3:.E82];[$Expenses.C3:.C82];[.A2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D5])" office:value-type="currency" office:currency="USD" office:value="0" calcext:value-type="currency">
            <text:p>$0.00</text:p>
          </table:table-cell>
          <table:table-cell table:formula="of:=SUMIF([$Expenses.C3:.C82];[.A2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ired labor</text:p>
          </table:table-cell>
          <table:table-cell table:formula="of:=SUMIFS([$Expenses.E3:.E82];[$Expenses.C3:.C82];[.A2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D5])" office:value-type="currency" office:currency="USD" office:value="0" calcext:value-type="currency">
            <text:p>$0.00</text:p>
          </table:table-cell>
          <table:table-cell table:formula="of:=SUMIF([$Expenses.C3:.C82];[.A2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Land rent / lease</text:p>
          </table:table-cell>
          <table:table-cell table:formula="of:=SUMIFS([$Expenses.E3:.E82];[$Expenses.C3:.C82];[.A2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D5])" office:value-type="currency" office:currency="USD" office:value="0" calcext:value-type="currency">
            <text:p>$0.00</text:p>
          </table:table-cell>
          <table:table-cell table:formula="of:=SUMIF([$Expenses.C3:.C82];[.A2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perating loan interest</text:p>
          </table:table-cell>
          <table:table-cell table:formula="of:=SUMIFS([$Expenses.E3:.E82];[$Expenses.C3:.C82];[.A2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D5])" office:value-type="currency" office:currency="USD" office:value="0" calcext:value-type="currency">
            <text:p>$0.00</text:p>
          </table:table-cell>
          <table:table-cell table:formula="of:=SUMIF([$Expenses.C3:.C82];[.A2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Supplies &amp; miscellaneous</text:p>
          </table:table-cell>
          <table:table-cell table:formula="of:=SUMIFS([$Expenses.E3:.E82];[$Expenses.C3:.C82];[.A3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D5])" office:value-type="currency" office:currency="USD" office:value="0" calcext:value-type="currency">
            <text:p>$0.00</text:p>
          </table:table-cell>
          <table:table-cell table:formula="of:=SUMIF([$Expenses.C3:.C82];[.A3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OPERATING EXPENSES</text:p>
          </table:table-cell>
          <table:table-cell table:style-name="ceCurTotal" table:formula="of:=SUM([.B18:.B30])" office:value-type="currency" office:currency="USD" office:value="0" calcext:value-type="currency">
            <text:p>$0.00</text:p>
          </table:table-cell>
          <table:table-cell table:style-name="ceCurTotal" table:formula="of:=SUM([.C18:.C30])" office:value-type="currency" office:currency="USD" office:value="0" calcext:value-type="currency">
            <text:p>$0.00</text:p>
          </table:table-cell>
          <table:table-cell table:style-name="ceCurTotal" table:formula="of:=SUM([.D18:.D30])" office:value-type="currency" office:currency="USD" office:value="0" calcext:value-type="currency">
            <text:p>$0.00</text:p>
          </table:table-cell>
          <table:table-cell table:style-name="ceCurTotal" table:formula="of:=SUM([.B31:.D31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LabelBold" office:value-type="string" calcext:value-type="string">
            <text:p>GROSS MARGIN <text:s/>(Revenue − Operating)</text:p>
          </table:table-cell>
          <table:table-cell table:style-name="ceCurTotal" table:formula="of:=[.B15]-[.B31]" office:value-type="currency" office:currency="USD" office:value="0" calcext:value-type="currency">
            <text:p>$0.00</text:p>
          </table:table-cell>
          <table:table-cell table:style-name="ceCurTotal" table:formula="of:=[.C15]-[.C31]" office:value-type="currency" office:currency="USD" office:value="0" calcext:value-type="currency">
            <text:p>$0.00</text:p>
          </table:table-cell>
          <table:table-cell table:style-name="ceCurTotal" table:formula="of:=[.D15]-[.D31]" office:value-type="currency" office:currency="USD" office:value="0" calcext:value-type="currency">
            <text:p>$0.00</text:p>
          </table:table-cell>
          <table:table-cell table:style-name="ceCurTotal" table:formula="of:=[.E15]-[.E31]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FIXED / OVERHEAD EXPENSE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Property / land taxes</text:p>
          </table:table-cell>
          <table:table-cell table:formula="of:=SUMIFS([$Expenses.E3:.E82];[$Expenses.C3:.C82];[.A3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D5])" office:value-type="currency" office:currency="USD" office:value="0" calcext:value-type="currency">
            <text:p>$0.00</text:p>
          </table:table-cell>
          <table:table-cell table:formula="of:=SUMIF([$Expenses.C3:.C82];[.A3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arm &amp; liability insurance</text:p>
          </table:table-cell>
          <table:table-cell table:formula="of:=SUMIFS([$Expenses.E3:.E82];[$Expenses.C3:.C82];[.A3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D5])" office:value-type="currency" office:currency="USD" office:value="0" calcext:value-type="currency">
            <text:p>$0.00</text:p>
          </table:table-cell>
          <table:table-cell table:formula="of:=SUMIF([$Expenses.C3:.C82];[.A3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epreciation (equipment &amp; buildings)</text:p>
          </table:table-cell>
          <table:table-cell table:formula="of:=SUMIFS([$Expenses.E3:.E82];[$Expenses.C3:.C82];[.A3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D5])" office:value-type="currency" office:currency="USD" office:value="0" calcext:value-type="currency">
            <text:p>$0.00</text:p>
          </table:table-cell>
          <table:table-cell table:formula="of:=SUMIF([$Expenses.C3:.C82];[.A3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erm loan interest</text:p>
          </table:table-cell>
          <table:table-cell table:formula="of:=SUMIFS([$Expenses.E3:.E82];[$Expenses.C3:.C82];[.A3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D5])" office:value-type="currency" office:currency="USD" office:value="0" calcext:value-type="currency">
            <text:p>$0.00</text:p>
          </table:table-cell>
          <table:table-cell table:formula="of:=SUMIF([$Expenses.C3:.C82];[.A3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overhead</text:p>
          </table:table-cell>
          <table:table-cell table:formula="of:=SUMIFS([$Expenses.E3:.E82];[$Expenses.C3:.C82];[.A4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D5])" office:value-type="currency" office:currency="USD" office:value="0" calcext:value-type="currency">
            <text:p>$0.00</text:p>
          </table:table-cell>
          <table:table-cell table:formula="of:=SUMIF([$Expenses.C3:.C82];[.A4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FIXED EXPENSES</text:p>
          </table:table-cell>
          <table:table-cell table:style-name="ceCurTotal" table:formula="of:=SUM([.B36:.B40])" office:value-type="currency" office:currency="USD" office:value="0" calcext:value-type="currency">
            <text:p>$0.00</text:p>
          </table:table-cell>
          <table:table-cell table:style-name="ceCurTotal" table:formula="of:=SUM([.C36:.C40])" office:value-type="currency" office:currency="USD" office:value="0" calcext:value-type="currency">
            <text:p>$0.00</text:p>
          </table:table-cell>
          <table:table-cell table:style-name="ceCurTotal" table:formula="of:=SUM([.D36:.D40])" office:value-type="currency" office:currency="USD" office:value="0" calcext:value-type="currency">
            <text:p>$0.00</text:p>
          </table:table-cell>
          <table:table-cell table:style-name="ceCurTotal" table:formula="of:=SUM([.B41:.D41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.B15]-[.B31]-[.B41]" office:value-type="currency" office:currency="USD" office:value="0" calcext:value-type="currency">
            <text:p>$0.00</text:p>
          </table:table-cell>
          <table:table-cell table:style-name="ceCurNet" table:formula="of:=[.C15]-[.C31]-[.C41]" office:value-type="currency" office:currency="USD" office:value="0" calcext:value-type="currency">
            <text:p>$0.00</text:p>
          </table:table-cell>
          <table:table-cell table:style-name="ceCurNet" table:formula="of:=[.D15]-[.D31]-[.D41]" office:value-type="currency" office:currency="USD" office:value="0" calcext:value-type="currency">
            <text:p>$0.00</text:p>
          </table:table-cell>
          <table:table-cell table:style-name="ceCurNet" table:formula="of:=[.E15]-[.E31]-[.E41]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Section" office:value-type="string" calcext:value-type="string" table:number-columns-spanned="5" table:number-rows-spanned="1">
            <text:p>PER-ACRE METRICS</text:p>
          </table:table-cell>
          <table:covered-table-cell table:number-columns-repeated="4" table:style-name="Default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IF([.B7]=0;0;[.B15]/[.B7])" office:value-type="currency" office:currency="USD" office:value="0" calcext:value-type="currency">
            <text:p>$0.00</text:p>
          </table:table-cell>
          <table:table-cell table:formula="of:=IF([.C7]=0;0;[.C15]/[.C7])" office:value-type="currency" office:currency="USD" office:value="0" calcext:value-type="currency">
            <text:p>$0.00</text:p>
          </table:table-cell>
          <table:table-cell table:formula="of:=IF([.D7]=0;0;[.D15]/[.D7])" office:value-type="currency" office:currency="USD" office:value="0" calcext:value-type="currency">
            <text:p>$0.00</text:p>
          </table:table-cell>
          <table:table-cell table:style-name="ceCur" table:formula="of:=IF([.E7]=0;0;[.E15]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IF([.B7]=0;0;([.B31]+[.B41])/[.B7])" office:value-type="currency" office:currency="USD" office:value="0" calcext:value-type="currency">
            <text:p>$0.00</text:p>
          </table:table-cell>
          <table:table-cell table:formula="of:=IF([.C7]=0;0;([.C31]+[.C41])/[.C7])" office:value-type="currency" office:currency="USD" office:value="0" calcext:value-type="currency">
            <text:p>$0.00</text:p>
          </table:table-cell>
          <table:table-cell table:formula="of:=IF([.D7]=0;0;([.D31]+[.D41])/[.D7])" office:value-type="currency" office:currency="USD" office:value="0" calcext:value-type="currency">
            <text:p>$0.00</text:p>
          </table:table-cell>
          <table:table-cell table:style-name="ceCur" table:formula="of:=IF([.E7]=0;0;([.E31]+[.E41])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IF([.B7]=0;0;[.B43]/[.B7])" office:value-type="currency" office:currency="USD" office:value="0" calcext:value-type="currency">
            <text:p>$0.00</text:p>
          </table:table-cell>
          <table:table-cell table:formula="of:=IF([.C7]=0;0;[.C43]/[.C7])" office:value-type="currency" office:currency="USD" office:value="0" calcext:value-type="currency">
            <text:p>$0.00</text:p>
          </table:table-cell>
          <table:table-cell table:formula="of:=IF([.D7]=0;0;[.D43]/[.D7])" office:value-type="currency" office:currency="USD" office:value="0" calcext:value-type="currency">
            <text:p>$0.00</text:p>
          </table:table-cell>
          <table:table-cell table:style-name="ceCur" table:formula="of:=IF([.E7]=0;0;[.E43]/[.E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Breakeven price per unit</text:p>
          </table:table-cell>
          <table:table-cell table:formula="of:=IF([.B8]=0;0;([.B31]+[.B41])/[.B8])" office:value-type="currency" office:currency="USD" office:value="0" calcext:value-type="currency">
            <text:p>$0.00</text:p>
          </table:table-cell>
          <table:table-cell table:formula="of:=IF([.C8]=0;0;([.C31]+[.C41])/[.C8])" office:value-type="currency" office:currency="USD" office:value="0" calcext:value-type="currency">
            <text:p>$0.00</text:p>
          </table:table-cell>
          <table:table-cell table:formula="of:=IF([.D8]=0;0;([.D31]+[.D41])/[.D8])" office:value-type="currency" office:currency="USD" office:value="0" calcext:value-type="currency">
            <text:p>$0.00</text:p>
          </table:table-cell>
          <table:table-cell table:style-name="ceCur"/>
        </table:table-row>
      </table:table>
      <table:table table:name="Sales" table:style-name="ta1">
        <table:table-column table:style-name="co4" table:default-cell-style-name="ceDateInput"/>
        <table:table-column table:style-name="co5" table:default-cell-style-name="ce17"/>
        <table:table-column table:style-name="co5" table:default-cell-style-name="ceTextInput"/>
        <table:table-column table:style-name="co6" table:default-cell-style-name="ceNumInput"/>
        <table:table-column table:style-name="co2" table:default-cell-style-name="ceCurInput"/>
        <table:table-column table:style-name="co2" table:default-cell-style-name="ceCur"/>
        <table:table-column table:style-name="co7" table:default-cell-style-name="ceTextInput"/>
        <table:table-row table:style-name="ro1">
          <table:table-cell table:style-name="ceTitle" office:value-type="string" calcext:value-type="string" table:number-columns-spanned="7" table:number-rows-spanned="1">
            <text:p>Sales Log — 2026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Buyer / Market</text:p>
          </table:table-cell>
          <table:table-cell table:style-name="ceHead" office:value-type="string" calcext:value-type="string">
            <text:p>Quantity (units)</text:p>
          </table:table-cell>
          <table:table-cell table:style-name="ceHead" office:value-type="string" calcext:value-type="string">
            <text:p>Price / unit ($)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]*[.E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]*[.E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]*[.E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]*[.E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7]*[.E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8]*[.E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9]*[.E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0]*[.E1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1]*[.E1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2]*[.E1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3]*[.E1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4]*[.E1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5]*[.E1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6]*[.E1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7]*[.E1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8]*[.E1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9]*[.E1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0]*[.E2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1]*[.E2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2]*[.E2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3]*[.E2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4]*[.E2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5]*[.E2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6]*[.E2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7]*[.E2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8]*[.E2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9]*[.E2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0]*[.E3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1]*[.E3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2]*[.E3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3]*[.E3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4]*[.E3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5]*[.E3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6]*[.E3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7]*[.E3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8]*[.E3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9]*[.E3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0]*[.E4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1]*[.E4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2]*[.E4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3]*[.E4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4]*[.E4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5]*[.E4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6]*[.E4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7]*[.E4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8]*[.E4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9]*[.E4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0]*[.E5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1]*[.E5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2]*[.E5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3]*[.E53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4]*[.E54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5]*[.E55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6]*[.E56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7]*[.E57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8]*[.E58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9]*[.E59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0]*[.E60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1]*[.E61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2]*[.E62]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SALES</text:p>
          </table:table-cell>
          <table:table-cell table:style-name="Default" table:number-columns-repeated="2"/>
          <table:table-cell table:style-name="ceCurTotal" table:formula="of:=SUM([.F3:.F62])" office:value-type="currency" office:currency="USD" office:value="0" calcext:value-type="currency">
            <text:p>$0.00</text:p>
          </table:table-cell>
          <table:table-cell table:style-name="Default"/>
        </table:table-row>
      </table:table>
      <table:table table:name="Expenses" table:style-name="ta1">
        <table:table-column table:style-name="co4" table:default-cell-style-name="ceDateInput"/>
        <table:table-column table:style-name="co5" table:default-cell-style-name="ce17"/>
        <table:table-column table:style-name="co1" table:default-cell-style-name="ce17"/>
        <table:table-column table:style-name="co5" table:default-cell-style-name="ce17"/>
        <table:table-column table:style-name="co2" table:default-cell-style-name="ceCurInput"/>
        <table:table-column table:style-name="co7" table:default-cell-style-name="ce17"/>
        <table:table-row table:style-name="ro1">
          <table:table-cell table:style-name="ceTitle" office:value-type="string" calcext:value-type="string" table:number-columns-spanned="6" table:number-rows-spanned="1">
            <text:p>Expense Log — 2026</text:p>
          </table:table-cell>
          <table:covered-table-cell table:number-columns-repeated="5" table:style-name="Default"/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Category</text:p>
          </table:table-cell>
          <table:table-cell table:style-name="ceHead" office:value-type="string" calcext:value-type="string">
            <text:p>Vendor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2"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2050" calcext:value-type="currency">
            <text:p>$2,050.00</text:p>
          </table:table-cell>
          <table:table-cell office:value-type="string" calcext:value-type="string">
            <text:p>Seed from 2025</text:p>
          </table:table-cell>
        </table:table-row>
        <table:table-row table:style-name="ro3" table:number-rows-repeated="79"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EXPENSES</text:p>
          </table:table-cell>
          <table:table-cell table:style-name="Default"/>
          <table:table-cell table:style-name="ceCurTotal" table:formula="of:=SUM([.E3:.E82])" office:value-type="currency" office:currency="USD" office:value="2050" calcext:value-type="currency">
            <text:p>$2,050.00</text:p>
          </table:table-cell>
          <table:table-cell table:style-name="Default"/>
        </table:table-row>
      </table:table>
      <table:table table:name="Assets &amp; Depreciation" table:style-name="ta1">
        <table:table-column table:style-name="co1" table:default-cell-style-name="ce17"/>
        <table:table-column table:style-name="co4" table:default-cell-style-name="ceDateInput"/>
        <table:table-column table:style-name="co2" table:number-columns-repeated="2" table:default-cell-style-name="ceCurInput"/>
        <table:table-column table:style-name="co6" table:default-cell-style-name="ceNumInput"/>
        <table:table-column table:style-name="co2" table:default-cell-style-name="ceCur"/>
        <table:table-column table:style-name="co2" table:default-cell-style-name="ceCurInput"/>
        <table:table-row table:style-name="ro1">
          <table:table-cell table:style-name="ceTitle" office:value-type="string" calcext:value-type="string" table:number-columns-spanned="7" table:number-rows-spanned="1">
            <text:p>Assets &amp; Depreciation (straight-line)</text:p>
          </table:table-cell>
          <table:covered-table-cell table:number-columns-repeated="6" table:style-name="Default"/>
        </table:table-row>
        <table:table-row table:style-name="ro3">
          <table:table-cell table:style-name="ceNote" office:value-type="string" calcext:value-type="string" table:number-columns-spanned="7" table:number-rows-spanned="1">
            <text:p>Annual depreciation = (Cost − Salvage) ÷ Useful life. Log the TOTAL below as a “Depreciation” expense in the Expenses tab.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Item / Equipment</text:p>
          </table:table-cell>
          <table:table-cell table:style-name="ceHead" office:value-type="string" calcext:value-type="string">
            <text:p>Purchase date</text:p>
          </table:table-cell>
          <table:table-cell table:style-name="ceHead" office:value-type="string" calcext:value-type="string">
            <text:p>Cost ($)</text:p>
          </table:table-cell>
          <table:table-cell table:style-name="ceHead" office:value-type="string" calcext:value-type="string">
            <text:p>Salvage value ($)</text:p>
          </table:table-cell>
          <table:table-cell table:style-name="ceHead" office:value-type="string" calcext:value-type="string">
            <text:p>Useful life (yrs)</text:p>
          </table:table-cell>
          <table:table-cell table:style-name="ceHead" office:value-type="string" calcext:value-type="string">
            <text:p>Annual depreciation ($)</text:p>
          </table:table-cell>
          <table:table-cell table:style-name="ceHead" office:value-type="string" calcext:value-type="string">
            <text:p>Accumulated to date ($)</text:p>
          </table:table-cell>
        </table:table-row>
        <table:table-row table:style-name="ro3">
          <table:table-cell table:number-columns-repeated="5"/>
          <table:table-cell table:formula="of:=IF([.E4]=0;0;([.C4]-[.D4])/[.E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5]=0;0;([.C5]-[.D5])/[.E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6]=0;0;([.C6]-[.D6])/[.E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7]=0;0;([.C7]-[.D7])/[.E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8]=0;0;([.C8]-[.D8])/[.E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9]=0;0;([.C9]-[.D9])/[.E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0]=0;0;([.C10]-[.D10])/[.E1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1]=0;0;([.C11]-[.D11])/[.E1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2]=0;0;([.C12]-[.D12])/[.E1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3]=0;0;([.C13]-[.D13])/[.E1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4]=0;0;([.C14]-[.D14])/[.E1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5]=0;0;([.C15]-[.D15])/[.E1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6]=0;0;([.C16]-[.D16])/[.E1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7]=0;0;([.C17]-[.D17])/[.E1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8]=0;0;([.C18]-[.D18])/[.E1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9]=0;0;([.C19]-[.D19])/[.E1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0]=0;0;([.C20]-[.D20])/[.E2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1]=0;0;([.C21]-[.D21])/[.E2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2]=0;0;([.C22]-[.D22])/[.E2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3]=0;0;([.C23]-[.D23])/[.E2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ceLabelBold" office:value-type="string" calcext:value-type="string">
            <text:p>TOTAL ANNUAL DEPRECIATION</text:p>
          </table:table-cell>
          <table:table-cell table:style-name="Default" table:number-columns-repeated="4"/>
          <table:table-cell table:style-name="ceCurTotal" table:formula="of:=SUM([.F4:.F23])" office:value-type="currency" office:currency="USD" office:value="0" calcext:value-type="currency">
            <text:p>$0.00</text:p>
          </table:table-cell>
          <table:table-cell table:style-name="ceCurTotal" table:formula="of:=SUM([.G4:.G23])" office:value-type="currency" office:currency="USD" office:value="0" calcext:value-type="currency">
            <text:p>$0.00</text:p>
          </table:table-cell>
        </table:table-row>
      </table:table>
      <table:table table:name="Summary" table:style-name="ta1">
        <table:table-column table:style-name="co1" table:default-cell-style-name="Default"/>
        <table:table-column table:style-name="co2" table:default-cell-style-name="ceCur"/>
        <table:table-column table:style-name="co2" table:number-columns-repeated="3" table:default-cell-style-name="Default"/>
        <table:table-row table:style-name="ro1">
          <table:table-cell table:style-name="ceTitle" office:value-type="string" calcext:value-type="string" table:number-columns-spanned="5" table:number-rows-spanned="1">
            <text:p>2026 Farm Summary — Dashboard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Note" office:value-type="string" calcext:value-type="string" table:number-columns-spanned="5" table:number-rows-spanned="1">
            <text:p>Live snapshot pulled from the P&amp;L tab.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WHOLE-FARM TOTALS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revenue</text:p>
          </table:table-cell>
          <table:table-cell table:formula="of:=[$'P&amp;L'.E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operating expenses</text:p>
          </table:table-cell>
          <table:table-cell table:formula="of:=[$'P&amp;L'.E3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fixed expenses</text:p>
          </table:table-cell>
          <table:table-cell table:formula="of:=[$'P&amp;L'.E4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$'P&amp;L'.E43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margin</text:p>
          </table:table-cell>
          <table:table-cell table:style-name="cePct" table:formula="of:=IF([$'P&amp;L'.E15]=0;0;[$'P&amp;L'.E43]/[$'P&amp;L'.E15])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VITY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acres planted</text:p>
          </table:table-cell>
          <table:table-cell table:style-name="ceNum" table:formula="of:=[$'P&amp;L'.E7]" office:value-type="float" office:value="0" calcext:value-type="float">
            <text:p>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[$'P&amp;L'.E4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[$'P&amp;L'.E47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[$'P&amp;L'.E4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BY CROP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HeadL" office:value-type="string" calcext:value-type="string">
            <text:p>Crop</text:p>
          </table:table-cell>
          <table:table-cell table:style-name="ceHead" office:value-type="string" calcext:value-type="string">
            <text:p>Revenue</text:p>
          </table:table-cell>
          <table:table-cell table:style-name="ceHead" office:value-type="string" calcext:value-type="string">
            <text:p>Total cost</text:p>
          </table:table-cell>
          <table:table-cell table:style-name="ceHead" office:value-type="string" calcext:value-type="string">
            <text:p>Net profit</text:p>
          </table:table-cell>
          <table:table-cell table:style-name="ceHead" office:value-type="string" calcext:value-type="string">
            <text:p>Profit / acre</text:p>
          </table:table-cell>
        </table:table-row>
        <table:table-row table:style-name="ro3">
          <table:table-cell table:style-name="ceLabelBold" table:formula="of:=[$'P&amp;L'.B5]" office:value-type="string" office:string-value="Soybeans" calcext:value-type="string">
            <text:p>Soybeans</text:p>
          </table:table-cell>
          <table:table-cell table:formula="of:=[$'P&amp;L'.B15]" office:value-type="currency" office:currency="USD" office:value="0" calcext:value-type="currency">
            <text:p>$0.00</text:p>
          </table:table-cell>
          <table:table-cell table:style-name="ceCur" table:formula="of:=[$'P&amp;L'.B31]+[$'P&amp;L'.B41]" office:value-type="currency" office:currency="USD" office:value="0" calcext:value-type="currency">
            <text:p>$0.00</text:p>
          </table:table-cell>
          <table:table-cell table:style-name="ceCurTotalLite" table:formula="of:=[$'P&amp;L'.B43]" office:value-type="currency" office:currency="USD" office:value="0" calcext:value-type="currency">
            <text:p>$0.00</text:p>
          </table:table-cell>
          <table:table-cell table:style-name="ceCur" table:formula="of:=[$'P&amp;L'.B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C5]" office:value-type="string" office:string-value="Crop 2" calcext:value-type="string">
            <text:p>Crop 2</text:p>
          </table:table-cell>
          <table:table-cell table:formula="of:=[$'P&amp;L'.C15]" office:value-type="currency" office:currency="USD" office:value="0" calcext:value-type="currency">
            <text:p>$0.00</text:p>
          </table:table-cell>
          <table:table-cell table:style-name="ceCur" table:formula="of:=[$'P&amp;L'.C31]+[$'P&amp;L'.C41]" office:value-type="currency" office:currency="USD" office:value="0" calcext:value-type="currency">
            <text:p>$0.00</text:p>
          </table:table-cell>
          <table:table-cell table:style-name="ceCurTotalLite" table:formula="of:=[$'P&amp;L'.C43]" office:value-type="currency" office:currency="USD" office:value="0" calcext:value-type="currency">
            <text:p>$0.00</text:p>
          </table:table-cell>
          <table:table-cell table:style-name="ceCur" table:formula="of:=[$'P&amp;L'.C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D5]" office:value-type="string" office:string-value="Crop 3" calcext:value-type="string">
            <text:p>Crop 3</text:p>
          </table:table-cell>
          <table:table-cell table:formula="of:=[$'P&amp;L'.D15]" office:value-type="currency" office:currency="USD" office:value="0" calcext:value-type="currency">
            <text:p>$0.00</text:p>
          </table:table-cell>
          <table:table-cell table:style-name="ceCur" table:formula="of:=[$'P&amp;L'.D31]+[$'P&amp;L'.D41]" office:value-type="currency" office:currency="USD" office:value="0" calcext:value-type="currency">
            <text:p>$0.00</text:p>
          </table:table-cell>
          <table:table-cell table:style-name="ceCurTotalLite" table:formula="of:=[$'P&amp;L'.D43]" office:value-type="currency" office:currency="USD" office:value="0" calcext:value-type="currency">
            <text:p>$0.00</text:p>
          </table:table-cell>
          <table:table-cell table:style-name="ceCur" table:formula="of:=[$'P&amp;L'.D48]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</number:currency-style>
    <number:currency-style style:name="N130">
      <number:currency-symbol number:language="en" number:country="US">$</number:currency-symbol>
      <number:number number:decimal-places="2" number:min-decimal-places="2" number:min-integer-digits="1" number:grouping="true"/>
      <style:map style:condition="value()&lt;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026 Farming Ventures - Costs &amp; Profits</dc:title>
    <dc:date>2026-06-08T10:53:29.327587314</dc:date>
    <meta:editing-duration>PT49S</meta:editing-duration>
    <meta:editing-cycles>1</meta:editing-cycles>
    <meta:generator>LibreOffice/26.2.3.2$Linux_X86_64 LibreOffice_project/620$Build-2</meta:generator>
    <meta:document-statistic meta:table-count="5" meta:cell-count="322" meta:object-count="0"/>
  </office:meta>
</office:document-meta>
</file>