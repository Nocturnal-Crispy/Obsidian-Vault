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number="urn:oasis:names:tc:opendocument:xmlns:datastyle:1.0" xmlns:of="urn:oasis:names:tc:opendocument:xmlns:of:1.2" office:version="1.2">
  <office:automatic-styles>
    <number:number-style style:name="NNUM">
      <number:number number:decimal-places="2" number:min-integer-digits="1" number:grouping="true"/>
    </number:number-style>
    <number:date-style style:name="NDATE">
      <number:year number:style="long"/>
      <number:text>-</number:text>
      <number:month number:style="long"/>
      <number:text>-</number:text>
      <number:day number:style="long"/>
    </number:date-style>
    <number:percentage-style style:name="NPCT">
      <number:number number:decimal-places="1" number:min-integer-digits="1"/>
      <number:text>%</number:text>
    </number:percentage-style>
    <number:currency-style style:name="NCURN" style:volatile="true">
      <style:text-properties fo:color="#cc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</number:currency-style>
    <number:currency-style style:name="NCUR">
      <number:currency-symbol number:language="en" number:country="US">$</number:currency-symbol>
      <number:number number:decimal-places="2" number:min-integer-digits="1" number:grouping="true"/>
      <style:map style:condition="value()&lt;0" style:apply-style-name="NCURN"/>
    </number:currency-style>
    <style:style style:name="cwLabel" style:family="table-column">
      <style:table-column-properties style:column-width="7.6cm"/>
    </style:style>
    <style:style style:name="cwData" style:family="table-column">
      <style:table-column-properties style:column-width="3.4cm"/>
    </style:style>
    <style:style style:name="cwDate" style:family="table-column">
      <style:table-column-properties style:column-width="2.8cm"/>
    </style:style>
    <style:style style:name="cwText" style:family="table-column">
      <style:table-column-properties style:column-width="4.2cm"/>
    </style:style>
    <style:style style:name="cwNum" style:family="table-column">
      <style:table-column-properties style:column-width="3.2cm"/>
    </style:style>
    <style:style style:name="cwCur" style:family="table-column">
      <style:table-column-properties style:column-width="3.4cm"/>
    </style:style>
    <style:style style:name="cwNotes" style:family="table-column">
      <style:table-column-properties style:column-width="6.0cm"/>
    </style:style>
    <style:style style:name="ceTitle" style:family="table-cell">
      <style:text-properties fo:font-size="15pt" fo:font-weight="bold" fo:color="#1f3864"/>
    </style:style>
    <style:style style:name="ceSub" style:family="table-cell">
      <style:text-properties fo:font-size="11pt" fo:font-weight="bold" fo:color="#44546a"/>
    </style:style>
    <style:style style:name="ceNote" style:family="table-cell">
      <style:text-properties fo:font-size="9pt" fo:font-style="italic" fo:color="#808080"/>
    </style:style>
    <style:style style:name="ceHead" style:family="table-cell">
      <style:table-cell-properties fo:background-color="#305496" style:vertical-align="middle" fo:border="0.5pt solid #ffffff"/>
      <style:paragraph-properties fo:text-align="center"/>
      <style:text-properties fo:font-weight="bold" fo:color="#ffffff"/>
    </style:style>
    <style:style style:name="ceHeadC" style:family="table-cell">
      <style:table-cell-properties fo:background-color="#305496" style:vertical-align="middle" fo:border="0.5pt solid #ffffff"/>
      <style:paragraph-properties fo:text-align="center"/>
      <style:text-properties fo:font-weight="bold" fo:color="#ffffff"/>
    </style:style>
    <style:style style:name="ceHeadL" style:family="table-cell">
      <style:table-cell-properties fo:background-color="#305496" fo:border="0.5pt solid #ffffff"/>
      <style:text-properties fo:font-weight="bold" fo:color="#ffffff"/>
    </style:style>
    <style:style style:name="ceSection" style:family="table-cell">
      <style:table-cell-properties fo:background-color="#d9e1f2" fo:border-top="0.5pt solid #8ea9db" fo:border-bottom="0.5pt solid #8ea9db"/>
      <style:text-properties fo:font-weight="bold" fo:color="#1f3864"/>
    </style:style>
    <style:style style:name="ceLabel" style:family="table-cell">
      <style:text-properties/>
    </style:style>
    <style:style style:name="ceLabelBold" style:family="table-cell">
      <style:text-properties fo:font-weight="bold"/>
    </style:style>
    <style:style style:name="ceLabelNet" style:family="table-cell">
      <style:table-cell-properties fo:background-color="#e2efda" fo:border-top="0.5pt solid #538135" fo:border-bottom="1pt double #538135"/>
      <style:text-properties fo:font-weight="bold" fo:font-size="12pt"/>
    </style:style>
    <style:style style:name="ceCur" style:family="table-cell" style:data-style-name="NCUR"/>
    <style:style style:name="ceNum" style:family="table-cell" style:data-style-name="NNUM"/>
    <style:style style:name="cePct" style:family="table-cell" style:data-style-name="NPCT">
      <style:text-properties fo:font-weight="bold"/>
    </style:style>
    <style:style style:name="ceCurInput" style:family="table-cell" style:data-style-name="NCUR">
      <style:table-cell-properties fo:background-color="#fff2cc" fo:border="0.5pt solid #d6b656"/>
    </style:style>
    <style:style style:name="ceNumInput" style:family="table-cell" style:data-style-name="NNUM">
      <style:table-cell-properties fo:background-color="#fff2cc" fo:border="0.5pt solid #d6b656"/>
    </style:style>
    <style:style style:name="ceDateInput" style:family="table-cell" style:data-style-name="NDATE">
      <style:table-cell-properties fo:background-color="#fff2cc" fo:border="0.5pt solid #d6b656"/>
    </style:style>
    <style:style style:name="ceTextInput" style:family="table-cell">
      <style:table-cell-properties fo:background-color="#fff2cc" fo:border="0.5pt solid #d6b656"/>
    </style:style>
    <style:style style:name="ceCurTotal" style:family="table-cell" style:data-style-name="NCUR">
      <style:table-cell-properties fo:border-top="0.5pt solid #404040"/>
      <style:text-properties fo:font-weight="bold"/>
    </style:style>
    <style:style style:name="ceCurTotalLite" style:family="table-cell" style:data-style-name="NCUR">
      <style:text-properties fo:font-weight="bold"/>
    </style:style>
    <style:style style:name="ceNumTotal" style:family="table-cell" style:data-style-name="NNUM">
      <style:text-properties fo:font-weight="bold"/>
    </style:style>
    <style:style style:name="ceCurNet" style:family="table-cell" style:data-style-name="NCUR">
      <style:table-cell-properties fo:background-color="#e2efda" fo:border-top="0.5pt solid #538135" fo:border-bottom="1pt double #538135"/>
      <style:text-properties fo:font-weight="bold" fo:font-size="12pt"/>
    </style:style>
  </office:automatic-styles>
  <office:body>
    <office:spreadsheet>
      <table:calculation-settings table:automatic-find-labels="false"/>
      <table:content-validations>
        <table:content-validation table:name="vCrop" table:condition="of:cell-content-is-in-list([$'P&amp;L'.B5:.D5])" table:allow-empty-cell="true" table:display-list="unsorted"/>
        <table:content-validation table:name="vCat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allow-empty-cell="true" table:display-list="unsorted"/>
      </table:content-validations>
      <table:table table:name="P&amp;L">
        <table:table-column table:style-name="cwLabel"/>
        <table:table-column table:style-name="cwData" table:number-columns-repeated="4"/>
        <table:table-row>
          <table:table-cell table:style-name="ceTitle" table:number-columns-spanned="5" office:value-type="string">
            <text:p>2026 Farming Ventures — Costs &amp; Profits</text:p>
          </table:table-cell>
          <table:covered-table-cell table:number-columns-repeated="4"/>
        </table:table-row>
        <table:table-row>
          <table:table-cell table:style-name="ceSub" table:number-columns-spanned="5" office:value-type="string">
            <text:p>Income Statement (P&amp;L)   •   Season 2026</text:p>
          </table:table-cell>
          <table:covered-table-cell table:number-columns-repeated="4"/>
        </table:table-row>
        <table:table-row>
          <table:table-cell table:style-name="ceNote" table:number-columns-spanned="5" office:value-type="string">
            <text:p>Yellow = type here.  White = auto-calculated.  Crop sales pull from the Sales tab; expense lines pull from the Expenses tab. Rename Crop 2 / Crop 3 below and pick the same names in the logs.</text:p>
          </table:table-cell>
          <table:covered-table-cell table:number-columns-repeated="4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HeadL" office:value-type="string">
            <text:p>ITEM</text:p>
          </table:table-cell>
          <table:table-cell table:style-name="ceHead" office:value-type="string">
            <text:p>Soybeans</text:p>
          </table:table-cell>
          <table:table-cell table:style-name="ceHead" office:value-type="string">
            <text:p>Crop 2</text:p>
          </table:table-cell>
          <table:table-cell table:style-name="ceHead" office:value-type="string">
            <text:p>Crop 3</text:p>
          </table:table-cell>
          <table:table-cell table:style-name="ceHead" office:value-type="string">
            <text:p>TOTAL (all crops)</text:p>
          </table:table-cell>
        </table:table-row>
        <table:table-row>
          <table:table-cell table:style-name="ceSection" table:number-columns-spanned="5" office:value-type="string">
            <text:p>PRODUCTION</text:p>
          </table:table-cell>
          <table:covered-table-cell table:number-columns-repeated="4"/>
        </table:table-row>
        <table:table-row>
          <table:table-cell table:style-name="ceLabel" office:value-type="string">
            <text:p>Acres planted</text:p>
          </table:table-cell>
          <table:table-cell table:style-name="ceNumInput"/>
          <table:table-cell table:style-name="ceNumInput"/>
          <table:table-cell table:style-name="ceNumInput"/>
          <table:table-cell table:style-name="ceNumTotal" table:formula="of:=SUM([.B7:.D7])" office:value-type="float"/>
        </table:table-row>
        <table:table-row>
          <table:table-cell table:style-name="ceLabel" office:value-type="string">
            <text:p>Total production (units harvested)</text:p>
          </table:table-cell>
          <table:table-cell table:style-name="ceNumInput"/>
          <table:table-cell table:style-name="ceNumInput"/>
          <table:table-cell table:style-name="ceNumInput"/>
          <table:table-cell table:style-name="ceNumTotal" table:formula="of:=SUM([.B8:.D8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REVENUE</text:p>
          </table:table-cell>
          <table:covered-table-cell table:number-columns-repeated="4"/>
        </table:table-row>
        <table:table-row>
          <table:table-cell table:style-name="ceLabel" office:value-type="string">
            <text:p>Crop sales  (from Sales tab)</text:p>
          </table:table-cell>
          <table:table-cell table:style-name="ceCur" table:formula="of:=SUMIF([$Sales.B3:.B62];[.B5];[$Sales.F3:.F62])" office:value-type="float"/>
          <table:table-cell table:style-name="ceCur" table:formula="of:=SUMIF([$Sales.B3:.B62];[.C5];[$Sales.F3:.F62])" office:value-type="float"/>
          <table:table-cell table:style-name="ceCur" table:formula="of:=SUMIF([$Sales.B3:.B62];[.D5];[$Sales.F3:.F62])" office:value-type="float"/>
          <table:table-cell table:style-name="ceCurTotalLite" table:formula="of:=SUM([.B11:.D11])" office:value-type="float"/>
        </table:table-row>
        <table:table-row>
          <table:table-cell table:style-name="ceLabel" office:value-type="string">
            <text:p>Government payments</text:p>
          </table:table-cell>
          <table:table-cell table:style-name="ceCurInput"/>
          <table:table-cell table:style-name="ceCurInput"/>
          <table:table-cell table:style-name="ceCurInput"/>
          <table:table-cell table:style-name="ceCurTotalLite" table:formula="of:=SUM([.B12:.D12])" office:value-type="float"/>
        </table:table-row>
        <table:table-row>
          <table:table-cell table:style-name="ceLabel" office:value-type="string">
            <text:p>Crop insurance proceeds</text:p>
          </table:table-cell>
          <table:table-cell table:style-name="ceCurInput"/>
          <table:table-cell table:style-name="ceCurInput"/>
          <table:table-cell table:style-name="ceCurInput"/>
          <table:table-cell table:style-name="ceCurTotalLite" table:formula="of:=SUM([.B13:.D13])" office:value-type="float"/>
        </table:table-row>
        <table:table-row>
          <table:table-cell table:style-name="ceLabel" office:value-type="string">
            <text:p>Other farm income</text:p>
          </table:table-cell>
          <table:table-cell table:style-name="ceCurInput"/>
          <table:table-cell table:style-name="ceCurInput"/>
          <table:table-cell table:style-name="ceCurInput"/>
          <table:table-cell table:style-name="ceCurTotalLite" table:formula="of:=SUM([.B14:.D14])" office:value-type="float"/>
        </table:table-row>
        <table:table-row>
          <table:table-cell table:style-name="ceLabelBold" office:value-type="string">
            <text:p>TOTAL REVENUE</text:p>
          </table:table-cell>
          <table:table-cell table:style-name="ceCurTotal" table:formula="of:=SUM([.B11:.B14])" office:value-type="float"/>
          <table:table-cell table:style-name="ceCurTotal" table:formula="of:=SUM([.C11:.C14])" office:value-type="float"/>
          <table:table-cell table:style-name="ceCurTotal" table:formula="of:=SUM([.D11:.D14])" office:value-type="float"/>
          <table:table-cell table:style-name="ceCurTotal" table:formula="of:=SUM([.B15:.D15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OPERATING (VARIABLE) EXPENSES</text:p>
          </table:table-cell>
          <table:covered-table-cell table:number-columns-repeated="4"/>
        </table:table-row>
        <table:table-row>
          <table:table-cell table:style-name="ceLabel" office:value-type="string">
            <text:p>Seed</text:p>
          </table:table-cell>
          <table:table-cell table:style-name="ceCur" table:formula="of:=SUMIFS([$Expenses.E3:.E82];[$Expenses.C3:.C82];[.A18];[$Expenses.B3:.B82];[.B5])" office:value-type="float"/>
          <table:table-cell table:style-name="ceCur" table:formula="of:=SUMIFS([$Expenses.E3:.E82];[$Expenses.C3:.C82];[.A18];[$Expenses.B3:.B82];[.C5])" office:value-type="float"/>
          <table:table-cell table:style-name="ceCur" table:formula="of:=SUMIFS([$Expenses.E3:.E82];[$Expenses.C3:.C82];[.A18];[$Expenses.B3:.B82];[.D5])" office:value-type="float"/>
          <table:table-cell table:style-name="ceCurTotalLite" table:formula="of:=SUMIF([$Expenses.C3:.C82];[.A18];[$Expenses.E3:.E82])" office:value-type="float"/>
        </table:table-row>
        <table:table-row>
          <table:table-cell table:style-name="ceLabel" office:value-type="string">
            <text:p>Fertilizer &amp; lime</text:p>
          </table:table-cell>
          <table:table-cell table:style-name="ceCur" table:formula="of:=SUMIFS([$Expenses.E3:.E82];[$Expenses.C3:.C82];[.A19];[$Expenses.B3:.B82];[.B5])" office:value-type="float"/>
          <table:table-cell table:style-name="ceCur" table:formula="of:=SUMIFS([$Expenses.E3:.E82];[$Expenses.C3:.C82];[.A19];[$Expenses.B3:.B82];[.C5])" office:value-type="float"/>
          <table:table-cell table:style-name="ceCur" table:formula="of:=SUMIFS([$Expenses.E3:.E82];[$Expenses.C3:.C82];[.A19];[$Expenses.B3:.B82];[.D5])" office:value-type="float"/>
          <table:table-cell table:style-name="ceCurTotalLite" table:formula="of:=SUMIF([$Expenses.C3:.C82];[.A19];[$Expenses.E3:.E82])" office:value-type="float"/>
        </table:table-row>
        <table:table-row>
          <table:table-cell table:style-name="ceLabel" office:value-type="string">
            <text:p>Chemicals (herbicide / pesticide)</text:p>
          </table:table-cell>
          <table:table-cell table:style-name="ceCur" table:formula="of:=SUMIFS([$Expenses.E3:.E82];[$Expenses.C3:.C82];[.A20];[$Expenses.B3:.B82];[.B5])" office:value-type="float"/>
          <table:table-cell table:style-name="ceCur" table:formula="of:=SUMIFS([$Expenses.E3:.E82];[$Expenses.C3:.C82];[.A20];[$Expenses.B3:.B82];[.C5])" office:value-type="float"/>
          <table:table-cell table:style-name="ceCur" table:formula="of:=SUMIFS([$Expenses.E3:.E82];[$Expenses.C3:.C82];[.A20];[$Expenses.B3:.B82];[.D5])" office:value-type="float"/>
          <table:table-cell table:style-name="ceCurTotalLite" table:formula="of:=SUMIF([$Expenses.C3:.C82];[.A20];[$Expenses.E3:.E82])" office:value-type="float"/>
        </table:table-row>
        <table:table-row>
          <table:table-cell table:style-name="ceLabel" office:value-type="string">
            <text:p>Crop insurance premiums</text:p>
          </table:table-cell>
          <table:table-cell table:style-name="ceCur" table:formula="of:=SUMIFS([$Expenses.E3:.E82];[$Expenses.C3:.C82];[.A21];[$Expenses.B3:.B82];[.B5])" office:value-type="float"/>
          <table:table-cell table:style-name="ceCur" table:formula="of:=SUMIFS([$Expenses.E3:.E82];[$Expenses.C3:.C82];[.A21];[$Expenses.B3:.B82];[.C5])" office:value-type="float"/>
          <table:table-cell table:style-name="ceCur" table:formula="of:=SUMIFS([$Expenses.E3:.E82];[$Expenses.C3:.C82];[.A21];[$Expenses.B3:.B82];[.D5])" office:value-type="float"/>
          <table:table-cell table:style-name="ceCurTotalLite" table:formula="of:=SUMIF([$Expenses.C3:.C82];[.A21];[$Expenses.E3:.E82])" office:value-type="float"/>
        </table:table-row>
        <table:table-row>
          <table:table-cell table:style-name="ceLabel" office:value-type="string">
            <text:p>Fuel &amp; oil</text:p>
          </table:table-cell>
          <table:table-cell table:style-name="ceCur" table:formula="of:=SUMIFS([$Expenses.E3:.E82];[$Expenses.C3:.C82];[.A22];[$Expenses.B3:.B82];[.B5])" office:value-type="float"/>
          <table:table-cell table:style-name="ceCur" table:formula="of:=SUMIFS([$Expenses.E3:.E82];[$Expenses.C3:.C82];[.A22];[$Expenses.B3:.B82];[.C5])" office:value-type="float"/>
          <table:table-cell table:style-name="ceCur" table:formula="of:=SUMIFS([$Expenses.E3:.E82];[$Expenses.C3:.C82];[.A22];[$Expenses.B3:.B82];[.D5])" office:value-type="float"/>
          <table:table-cell table:style-name="ceCurTotalLite" table:formula="of:=SUMIF([$Expenses.C3:.C82];[.A22];[$Expenses.E3:.E82])" office:value-type="float"/>
        </table:table-row>
        <table:table-row>
          <table:table-cell table:style-name="ceLabel" office:value-type="string">
            <text:p>Custom hire / machine work</text:p>
          </table:table-cell>
          <table:table-cell table:style-name="ceCur" table:formula="of:=SUMIFS([$Expenses.E3:.E82];[$Expenses.C3:.C82];[.A23];[$Expenses.B3:.B82];[.B5])" office:value-type="float"/>
          <table:table-cell table:style-name="ceCur" table:formula="of:=SUMIFS([$Expenses.E3:.E82];[$Expenses.C3:.C82];[.A23];[$Expenses.B3:.B82];[.C5])" office:value-type="float"/>
          <table:table-cell table:style-name="ceCur" table:formula="of:=SUMIFS([$Expenses.E3:.E82];[$Expenses.C3:.C82];[.A23];[$Expenses.B3:.B82];[.D5])" office:value-type="float"/>
          <table:table-cell table:style-name="ceCurTotalLite" table:formula="of:=SUMIF([$Expenses.C3:.C82];[.A23];[$Expenses.E3:.E82])" office:value-type="float"/>
        </table:table-row>
        <table:table-row>
          <table:table-cell table:style-name="ceLabel" office:value-type="string">
            <text:p>Repairs &amp; maintenance</text:p>
          </table:table-cell>
          <table:table-cell table:style-name="ceCur" table:formula="of:=SUMIFS([$Expenses.E3:.E82];[$Expenses.C3:.C82];[.A24];[$Expenses.B3:.B82];[.B5])" office:value-type="float"/>
          <table:table-cell table:style-name="ceCur" table:formula="of:=SUMIFS([$Expenses.E3:.E82];[$Expenses.C3:.C82];[.A24];[$Expenses.B3:.B82];[.C5])" office:value-type="float"/>
          <table:table-cell table:style-name="ceCur" table:formula="of:=SUMIFS([$Expenses.E3:.E82];[$Expenses.C3:.C82];[.A24];[$Expenses.B3:.B82];[.D5])" office:value-type="float"/>
          <table:table-cell table:style-name="ceCurTotalLite" table:formula="of:=SUMIF([$Expenses.C3:.C82];[.A24];[$Expenses.E3:.E82])" office:value-type="float"/>
        </table:table-row>
        <table:table-row>
          <table:table-cell table:style-name="ceLabel" office:value-type="string">
            <text:p>Drying &amp; storage</text:p>
          </table:table-cell>
          <table:table-cell table:style-name="ceCur" table:formula="of:=SUMIFS([$Expenses.E3:.E82];[$Expenses.C3:.C82];[.A25];[$Expenses.B3:.B82];[.B5])" office:value-type="float"/>
          <table:table-cell table:style-name="ceCur" table:formula="of:=SUMIFS([$Expenses.E3:.E82];[$Expenses.C3:.C82];[.A25];[$Expenses.B3:.B82];[.C5])" office:value-type="float"/>
          <table:table-cell table:style-name="ceCur" table:formula="of:=SUMIFS([$Expenses.E3:.E82];[$Expenses.C3:.C82];[.A25];[$Expenses.B3:.B82];[.D5])" office:value-type="float"/>
          <table:table-cell table:style-name="ceCurTotalLite" table:formula="of:=SUMIF([$Expenses.C3:.C82];[.A25];[$Expenses.E3:.E82])" office:value-type="float"/>
        </table:table-row>
        <table:table-row>
          <table:table-cell table:style-name="ceLabel" office:value-type="string">
            <text:p>Hauling / trucking</text:p>
          </table:table-cell>
          <table:table-cell table:style-name="ceCur" table:formula="of:=SUMIFS([$Expenses.E3:.E82];[$Expenses.C3:.C82];[.A26];[$Expenses.B3:.B82];[.B5])" office:value-type="float"/>
          <table:table-cell table:style-name="ceCur" table:formula="of:=SUMIFS([$Expenses.E3:.E82];[$Expenses.C3:.C82];[.A26];[$Expenses.B3:.B82];[.C5])" office:value-type="float"/>
          <table:table-cell table:style-name="ceCur" table:formula="of:=SUMIFS([$Expenses.E3:.E82];[$Expenses.C3:.C82];[.A26];[$Expenses.B3:.B82];[.D5])" office:value-type="float"/>
          <table:table-cell table:style-name="ceCurTotalLite" table:formula="of:=SUMIF([$Expenses.C3:.C82];[.A26];[$Expenses.E3:.E82])" office:value-type="float"/>
        </table:table-row>
        <table:table-row>
          <table:table-cell table:style-name="ceLabel" office:value-type="string">
            <text:p>Hired labor</text:p>
          </table:table-cell>
          <table:table-cell table:style-name="ceCur" table:formula="of:=SUMIFS([$Expenses.E3:.E82];[$Expenses.C3:.C82];[.A27];[$Expenses.B3:.B82];[.B5])" office:value-type="float"/>
          <table:table-cell table:style-name="ceCur" table:formula="of:=SUMIFS([$Expenses.E3:.E82];[$Expenses.C3:.C82];[.A27];[$Expenses.B3:.B82];[.C5])" office:value-type="float"/>
          <table:table-cell table:style-name="ceCur" table:formula="of:=SUMIFS([$Expenses.E3:.E82];[$Expenses.C3:.C82];[.A27];[$Expenses.B3:.B82];[.D5])" office:value-type="float"/>
          <table:table-cell table:style-name="ceCurTotalLite" table:formula="of:=SUMIF([$Expenses.C3:.C82];[.A27];[$Expenses.E3:.E82])" office:value-type="float"/>
        </table:table-row>
        <table:table-row>
          <table:table-cell table:style-name="ceLabel" office:value-type="string">
            <text:p>Land rent / lease</text:p>
          </table:table-cell>
          <table:table-cell table:style-name="ceCur" table:formula="of:=SUMIFS([$Expenses.E3:.E82];[$Expenses.C3:.C82];[.A28];[$Expenses.B3:.B82];[.B5])" office:value-type="float"/>
          <table:table-cell table:style-name="ceCur" table:formula="of:=SUMIFS([$Expenses.E3:.E82];[$Expenses.C3:.C82];[.A28];[$Expenses.B3:.B82];[.C5])" office:value-type="float"/>
          <table:table-cell table:style-name="ceCur" table:formula="of:=SUMIFS([$Expenses.E3:.E82];[$Expenses.C3:.C82];[.A28];[$Expenses.B3:.B82];[.D5])" office:value-type="float"/>
          <table:table-cell table:style-name="ceCurTotalLite" table:formula="of:=SUMIF([$Expenses.C3:.C82];[.A28];[$Expenses.E3:.E82])" office:value-type="float"/>
        </table:table-row>
        <table:table-row>
          <table:table-cell table:style-name="ceLabel" office:value-type="string">
            <text:p>Operating loan interest</text:p>
          </table:table-cell>
          <table:table-cell table:style-name="ceCur" table:formula="of:=SUMIFS([$Expenses.E3:.E82];[$Expenses.C3:.C82];[.A29];[$Expenses.B3:.B82];[.B5])" office:value-type="float"/>
          <table:table-cell table:style-name="ceCur" table:formula="of:=SUMIFS([$Expenses.E3:.E82];[$Expenses.C3:.C82];[.A29];[$Expenses.B3:.B82];[.C5])" office:value-type="float"/>
          <table:table-cell table:style-name="ceCur" table:formula="of:=SUMIFS([$Expenses.E3:.E82];[$Expenses.C3:.C82];[.A29];[$Expenses.B3:.B82];[.D5])" office:value-type="float"/>
          <table:table-cell table:style-name="ceCurTotalLite" table:formula="of:=SUMIF([$Expenses.C3:.C82];[.A29];[$Expenses.E3:.E82])" office:value-type="float"/>
        </table:table-row>
        <table:table-row>
          <table:table-cell table:style-name="ceLabel" office:value-type="string">
            <text:p>Supplies &amp; miscellaneous</text:p>
          </table:table-cell>
          <table:table-cell table:style-name="ceCur" table:formula="of:=SUMIFS([$Expenses.E3:.E82];[$Expenses.C3:.C82];[.A30];[$Expenses.B3:.B82];[.B5])" office:value-type="float"/>
          <table:table-cell table:style-name="ceCur" table:formula="of:=SUMIFS([$Expenses.E3:.E82];[$Expenses.C3:.C82];[.A30];[$Expenses.B3:.B82];[.C5])" office:value-type="float"/>
          <table:table-cell table:style-name="ceCur" table:formula="of:=SUMIFS([$Expenses.E3:.E82];[$Expenses.C3:.C82];[.A30];[$Expenses.B3:.B82];[.D5])" office:value-type="float"/>
          <table:table-cell table:style-name="ceCurTotalLite" table:formula="of:=SUMIF([$Expenses.C3:.C82];[.A30];[$Expenses.E3:.E82])" office:value-type="float"/>
        </table:table-row>
        <table:table-row>
          <table:table-cell table:style-name="ceLabelBold" office:value-type="string">
            <text:p>TOTAL OPERATING EXPENSES</text:p>
          </table:table-cell>
          <table:table-cell table:style-name="ceCurTotal" table:formula="of:=SUM([.B18:.B30])" office:value-type="float"/>
          <table:table-cell table:style-name="ceCurTotal" table:formula="of:=SUM([.C18:.C30])" office:value-type="float"/>
          <table:table-cell table:style-name="ceCurTotal" table:formula="of:=SUM([.D18:.D30])" office:value-type="float"/>
          <table:table-cell table:style-name="ceCurTotal" table:formula="of:=SUM([.B31:.D31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Bold" office:value-type="string">
            <text:p>GROSS MARGIN  (Revenue − Operating)</text:p>
          </table:table-cell>
          <table:table-cell table:style-name="ceCurTotal" table:formula="of:=[.B15]-[.B31]" office:value-type="float"/>
          <table:table-cell table:style-name="ceCurTotal" table:formula="of:=[.C15]-[.C31]" office:value-type="float"/>
          <table:table-cell table:style-name="ceCurTotal" table:formula="of:=[.D15]-[.D31]" office:value-type="float"/>
          <table:table-cell table:style-name="ceCurTotal" table:formula="of:=[.E15]-[.E31]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FIXED / OVERHEAD EXPENSES</text:p>
          </table:table-cell>
          <table:covered-table-cell table:number-columns-repeated="4"/>
        </table:table-row>
        <table:table-row>
          <table:table-cell table:style-name="ceLabel" office:value-type="string">
            <text:p>Property / land taxes</text:p>
          </table:table-cell>
          <table:table-cell table:style-name="ceCur" table:formula="of:=SUMIFS([$Expenses.E3:.E82];[$Expenses.C3:.C82];[.A36];[$Expenses.B3:.B82];[.B5])" office:value-type="float"/>
          <table:table-cell table:style-name="ceCur" table:formula="of:=SUMIFS([$Expenses.E3:.E82];[$Expenses.C3:.C82];[.A36];[$Expenses.B3:.B82];[.C5])" office:value-type="float"/>
          <table:table-cell table:style-name="ceCur" table:formula="of:=SUMIFS([$Expenses.E3:.E82];[$Expenses.C3:.C82];[.A36];[$Expenses.B3:.B82];[.D5])" office:value-type="float"/>
          <table:table-cell table:style-name="ceCurTotalLite" table:formula="of:=SUMIF([$Expenses.C3:.C82];[.A36];[$Expenses.E3:.E82])" office:value-type="float"/>
        </table:table-row>
        <table:table-row>
          <table:table-cell table:style-name="ceLabel" office:value-type="string">
            <text:p>Farm &amp; liability insurance</text:p>
          </table:table-cell>
          <table:table-cell table:style-name="ceCur" table:formula="of:=SUMIFS([$Expenses.E3:.E82];[$Expenses.C3:.C82];[.A37];[$Expenses.B3:.B82];[.B5])" office:value-type="float"/>
          <table:table-cell table:style-name="ceCur" table:formula="of:=SUMIFS([$Expenses.E3:.E82];[$Expenses.C3:.C82];[.A37];[$Expenses.B3:.B82];[.C5])" office:value-type="float"/>
          <table:table-cell table:style-name="ceCur" table:formula="of:=SUMIFS([$Expenses.E3:.E82];[$Expenses.C3:.C82];[.A37];[$Expenses.B3:.B82];[.D5])" office:value-type="float"/>
          <table:table-cell table:style-name="ceCurTotalLite" table:formula="of:=SUMIF([$Expenses.C3:.C82];[.A37];[$Expenses.E3:.E82])" office:value-type="float"/>
        </table:table-row>
        <table:table-row>
          <table:table-cell table:style-name="ceLabel" office:value-type="string">
            <text:p>Depreciation (equipment &amp; buildings)</text:p>
          </table:table-cell>
          <table:table-cell table:style-name="ceCur" table:formula="of:=SUMIFS([$Expenses.E3:.E82];[$Expenses.C3:.C82];[.A38];[$Expenses.B3:.B82];[.B5])" office:value-type="float"/>
          <table:table-cell table:style-name="ceCur" table:formula="of:=SUMIFS([$Expenses.E3:.E82];[$Expenses.C3:.C82];[.A38];[$Expenses.B3:.B82];[.C5])" office:value-type="float"/>
          <table:table-cell table:style-name="ceCur" table:formula="of:=SUMIFS([$Expenses.E3:.E82];[$Expenses.C3:.C82];[.A38];[$Expenses.B3:.B82];[.D5])" office:value-type="float"/>
          <table:table-cell table:style-name="ceCurTotalLite" table:formula="of:=SUMIF([$Expenses.C3:.C82];[.A38];[$Expenses.E3:.E82])" office:value-type="float"/>
        </table:table-row>
        <table:table-row>
          <table:table-cell table:style-name="ceLabel" office:value-type="string">
            <text:p>Term loan interest</text:p>
          </table:table-cell>
          <table:table-cell table:style-name="ceCur" table:formula="of:=SUMIFS([$Expenses.E3:.E82];[$Expenses.C3:.C82];[.A39];[$Expenses.B3:.B82];[.B5])" office:value-type="float"/>
          <table:table-cell table:style-name="ceCur" table:formula="of:=SUMIFS([$Expenses.E3:.E82];[$Expenses.C3:.C82];[.A39];[$Expenses.B3:.B82];[.C5])" office:value-type="float"/>
          <table:table-cell table:style-name="ceCur" table:formula="of:=SUMIFS([$Expenses.E3:.E82];[$Expenses.C3:.C82];[.A39];[$Expenses.B3:.B82];[.D5])" office:value-type="float"/>
          <table:table-cell table:style-name="ceCurTotalLite" table:formula="of:=SUMIF([$Expenses.C3:.C82];[.A39];[$Expenses.E3:.E82])" office:value-type="float"/>
        </table:table-row>
        <table:table-row>
          <table:table-cell table:style-name="ceLabel" office:value-type="string">
            <text:p>Other overhead</text:p>
          </table:table-cell>
          <table:table-cell table:style-name="ceCur" table:formula="of:=SUMIFS([$Expenses.E3:.E82];[$Expenses.C3:.C82];[.A40];[$Expenses.B3:.B82];[.B5])" office:value-type="float"/>
          <table:table-cell table:style-name="ceCur" table:formula="of:=SUMIFS([$Expenses.E3:.E82];[$Expenses.C3:.C82];[.A40];[$Expenses.B3:.B82];[.C5])" office:value-type="float"/>
          <table:table-cell table:style-name="ceCur" table:formula="of:=SUMIFS([$Expenses.E3:.E82];[$Expenses.C3:.C82];[.A40];[$Expenses.B3:.B82];[.D5])" office:value-type="float"/>
          <table:table-cell table:style-name="ceCurTotalLite" table:formula="of:=SUMIF([$Expenses.C3:.C82];[.A40];[$Expenses.E3:.E82])" office:value-type="float"/>
        </table:table-row>
        <table:table-row>
          <table:table-cell table:style-name="ceLabelBold" office:value-type="string">
            <text:p>TOTAL FIXED EXPENSES</text:p>
          </table:table-cell>
          <table:table-cell table:style-name="ceCurTotal" table:formula="of:=SUM([.B36:.B40])" office:value-type="float"/>
          <table:table-cell table:style-name="ceCurTotal" table:formula="of:=SUM([.C36:.C40])" office:value-type="float"/>
          <table:table-cell table:style-name="ceCurTotal" table:formula="of:=SUM([.D36:.D40])" office:value-type="float"/>
          <table:table-cell table:style-name="ceCurTotal" table:formula="of:=SUM([.B41:.D41])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Net" office:value-type="string">
            <text:p>NET PROFIT / (LOSS)</text:p>
          </table:table-cell>
          <table:table-cell table:style-name="ceCurNet" table:formula="of:=[.B15]-[.B31]-[.B41]" office:value-type="float"/>
          <table:table-cell table:style-name="ceCurNet" table:formula="of:=[.C15]-[.C31]-[.C41]" office:value-type="float"/>
          <table:table-cell table:style-name="ceCurNet" table:formula="of:=[.D15]-[.D31]-[.D41]" office:value-type="float"/>
          <table:table-cell table:style-name="ceCurNet" table:formula="of:=[.E15]-[.E31]-[.E41]" office:value-type="float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PER-ACRE METRICS</text:p>
          </table:table-cell>
          <table:covered-table-cell table:number-columns-repeated="4"/>
        </table:table-row>
        <table:table-row>
          <table:table-cell table:style-name="ceLabel" office:value-type="string">
            <text:p>Revenue per acre</text:p>
          </table:table-cell>
          <table:table-cell table:style-name="ceCur" table:formula="of:=IF([.B7]=0;0;[.B15]/[.B7])" office:value-type="float"/>
          <table:table-cell table:style-name="ceCur" table:formula="of:=IF([.C7]=0;0;[.C15]/[.C7])" office:value-type="float"/>
          <table:table-cell table:style-name="ceCur" table:formula="of:=IF([.D7]=0;0;[.D15]/[.D7])" office:value-type="float"/>
          <table:table-cell table:style-name="ceCur" table:formula="of:=IF([.E7]=0;0;[.E15]/[.E7])" office:value-type="float"/>
        </table:table-row>
        <table:table-row>
          <table:table-cell table:style-name="ceLabel" office:value-type="string">
            <text:p>Total cost per acre</text:p>
          </table:table-cell>
          <table:table-cell table:style-name="ceCur" table:formula="of:=IF([.B7]=0;0;([.B31]+[.B41])/[.B7])" office:value-type="float"/>
          <table:table-cell table:style-name="ceCur" table:formula="of:=IF([.C7]=0;0;([.C31]+[.C41])/[.C7])" office:value-type="float"/>
          <table:table-cell table:style-name="ceCur" table:formula="of:=IF([.D7]=0;0;([.D31]+[.D41])/[.D7])" office:value-type="float"/>
          <table:table-cell table:style-name="ceCur" table:formula="of:=IF([.E7]=0;0;([.E31]+[.E41])/[.E7])" office:value-type="float"/>
        </table:table-row>
        <table:table-row>
          <table:table-cell table:style-name="ceLabel" office:value-type="string">
            <text:p>Profit per acre</text:p>
          </table:table-cell>
          <table:table-cell table:style-name="ceCur" table:formula="of:=IF([.B7]=0;0;[.B43]/[.B7])" office:value-type="float"/>
          <table:table-cell table:style-name="ceCur" table:formula="of:=IF([.C7]=0;0;[.C43]/[.C7])" office:value-type="float"/>
          <table:table-cell table:style-name="ceCur" table:formula="of:=IF([.D7]=0;0;[.D43]/[.D7])" office:value-type="float"/>
          <table:table-cell table:style-name="ceCur" table:formula="of:=IF([.E7]=0;0;[.E43]/[.E7])" office:value-type="float"/>
        </table:table-row>
        <table:table-row>
          <table:table-cell table:style-name="ceLabel" office:value-type="string">
            <text:p>Breakeven price per unit</text:p>
          </table:table-cell>
          <table:table-cell table:style-name="ceCur" table:formula="of:=IF([.B8]=0;0;([.B31]+[.B41])/[.B8])" office:value-type="float"/>
          <table:table-cell table:style-name="ceCur" table:formula="of:=IF([.C8]=0;0;([.C31]+[.C41])/[.C8])" office:value-type="float"/>
          <table:table-cell table:style-name="ceCur" table:formula="of:=IF([.D8]=0;0;([.D31]+[.D41])/[.D8])" office:value-type="float"/>
          <table:table-cell table:style-name="ceCur"/>
        </table:table-row>
      </table:table>
      <table:table table:name="Sales">
        <table:table-column table:style-name="cwDate"/>
        <table:table-column table:style-name="cwText"/>
        <table:table-column table:style-name="cwText"/>
        <table:table-column table:style-name="cwNum"/>
        <table:table-column table:style-name="cwCur"/>
        <table:table-column table:style-name="cwCur"/>
        <table:table-column table:style-name="cwNotes"/>
        <table:table-row>
          <table:table-cell table:style-name="ceTitle" table:number-columns-spanned="7" office:value-type="string">
            <text:p>Sales Log — 2026</text:p>
          </table:table-cell>
          <table:covered-table-cell table:number-columns-repeated="6"/>
        </table:table-row>
        <table:table-row>
          <table:table-cell table:style-name="ceHeadC" office:value-type="string">
            <text:p>Date</text:p>
          </table:table-cell>
          <table:table-cell table:style-name="ceHeadC" office:value-type="string">
            <text:p>Crop</text:p>
          </table:table-cell>
          <table:table-cell table:style-name="ceHeadC" office:value-type="string">
            <text:p>Buyer / Market</text:p>
          </table:table-cell>
          <table:table-cell table:style-name="ceHeadC" office:value-type="string">
            <text:p>Quantity (units)</text:p>
          </table:table-cell>
          <table:table-cell table:style-name="ceHeadC" office:value-type="string">
            <text:p>Price / unit ($)</text:p>
          </table:table-cell>
          <table:table-cell table:style-name="ceHeadC" office:value-type="string">
            <text:p>Amount ($)</text:p>
          </table:table-cell>
          <table:table-cell table:style-name="ceHeadC" office:value-type="string">
            <text:p>Notes</text:p>
          </table:table-cell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]*[.E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]*[.E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]*[.E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6]*[.E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7]*[.E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8]*[.E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9]*[.E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0]*[.E1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1]*[.E1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2]*[.E1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3]*[.E1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4]*[.E1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5]*[.E1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6]*[.E1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7]*[.E1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8]*[.E1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19]*[.E1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0]*[.E2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1]*[.E2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2]*[.E2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3]*[.E2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4]*[.E2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5]*[.E2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6]*[.E2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7]*[.E2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8]*[.E2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29]*[.E2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0]*[.E3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1]*[.E3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2]*[.E3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3]*[.E3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4]*[.E3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5]*[.E3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6]*[.E3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7]*[.E3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8]*[.E3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39]*[.E3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0]*[.E4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1]*[.E4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2]*[.E4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3]*[.E4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4]*[.E4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5]*[.E4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6]*[.E4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7]*[.E4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8]*[.E4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49]*[.E4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0]*[.E5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1]*[.E5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2]*[.E52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3]*[.E53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4]*[.E54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5]*[.E55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6]*[.E56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7]*[.E57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8]*[.E58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59]*[.E59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60]*[.E60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61]*[.E61]" office:value-type="floa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/>
          <table:table-cell table:style-name="ceNumInput"/>
          <table:table-cell table:style-name="ceCurInput"/>
          <table:table-cell table:style-name="ceCur" table:formula="of:=[.D62]*[.E62]" office:value-type="float"/>
          <table:table-cell table:style-name="ceTextInput"/>
        </table:table-row>
        <table:table-row>
          <table:table-cell table:style-name="ceLabel"/>
          <table:table-cell table:style-name="ceLabel"/>
          <table:table-cell table:style-name="ceLabelBold" office:value-type="string">
            <text:p>TOTAL SALES</text:p>
          </table:table-cell>
          <table:table-cell table:style-name="ceLabel"/>
          <table:table-cell table:style-name="ceLabel"/>
          <table:table-cell table:style-name="ceCurTotal" table:formula="of:=SUM([.F3:.F62])" office:value-type="float"/>
          <table:table-cell table:style-name="ceLabel"/>
        </table:table-row>
      </table:table>
      <table:table table:name="Expenses">
        <table:table-column table:style-name="cwDate"/>
        <table:table-column table:style-name="cwText"/>
        <table:table-column table:style-name="cwLabel"/>
        <table:table-column table:style-name="cwText"/>
        <table:table-column table:style-name="cwCur"/>
        <table:table-column table:style-name="cwNotes"/>
        <table:table-row>
          <table:table-cell table:style-name="ceTitle" table:number-columns-spanned="6" office:value-type="string">
            <text:p>Expense Log — 2026</text:p>
          </table:table-cell>
          <table:covered-table-cell table:number-columns-repeated="5"/>
        </table:table-row>
        <table:table-row>
          <table:table-cell table:style-name="ceHeadC" office:value-type="string">
            <text:p>Date</text:p>
          </table:table-cell>
          <table:table-cell table:style-name="ceHeadC" office:value-type="string">
            <text:p>Crop</text:p>
          </table:table-cell>
          <table:table-cell table:style-name="ceHeadC" office:value-type="string">
            <text:p>Category</text:p>
          </table:table-cell>
          <table:table-cell table:style-name="ceHeadC" office:value-type="string">
            <text:p>Vendor</text:p>
          </table:table-cell>
          <table:table-cell table:style-name="ceHeadC" office:value-type="string">
            <text:p>Amount ($)</text:p>
          </table:table-cell>
          <table:table-cell table:style-name="ceHeadC" office:value-type="string">
            <text:p>Notes</text:p>
          </table:table-cell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DateInput"/>
          <table:table-cell table:style-name="ceTextInput" table:content-validation-name="vCrop"/>
          <table:table-cell table:style-name="ceTextInput" table:content-validation-name="vCat"/>
          <table:table-cell table:style-name="ceTextInput"/>
          <table:table-cell table:style-name="ceCurInput"/>
          <table:table-cell table:style-name="ceTextInput"/>
        </table:table-row>
        <table:table-row>
          <table:table-cell table:style-name="ceLabel"/>
          <table:table-cell table:style-name="ceLabel"/>
          <table:table-cell table:style-name="ceLabelBold" office:value-type="string">
            <text:p>TOTAL EXPENSES</text:p>
          </table:table-cell>
          <table:table-cell table:style-name="ceLabel"/>
          <table:table-cell table:style-name="ceCurTotal" table:formula="of:=SUM([.E3:.E82])" office:value-type="float"/>
          <table:table-cell table:style-name="ceLabel"/>
        </table:table-row>
      </table:table>
      <table:table table:name="Assets &amp; Depreciation">
        <table:table-column table:style-name="cwLabel"/>
        <table:table-column table:style-name="cwDate"/>
        <table:table-column table:style-name="cwCur"/>
        <table:table-column table:style-name="cwCur"/>
        <table:table-column table:style-name="cwNum"/>
        <table:table-column table:style-name="cwCur"/>
        <table:table-column table:style-name="cwCur"/>
        <table:table-row>
          <table:table-cell table:style-name="ceTitle" table:number-columns-spanned="7" office:value-type="string">
            <text:p>Assets &amp; Depreciation (straight-line)</text:p>
          </table:table-cell>
          <table:covered-table-cell table:number-columns-repeated="6"/>
        </table:table-row>
        <table:table-row>
          <table:table-cell table:style-name="ceNote" table:number-columns-spanned="7" office:value-type="string">
            <text:p>Annual depreciation = (Cost − Salvage) ÷ Useful life. Log the TOTAL below as a “Depreciation” expense in the Expenses tab.</text:p>
          </table:table-cell>
          <table:covered-table-cell table:number-columns-repeated="6"/>
        </table:table-row>
        <table:table-row>
          <table:table-cell table:style-name="ceHeadC" office:value-type="string">
            <text:p>Item / Equipment</text:p>
          </table:table-cell>
          <table:table-cell table:style-name="ceHeadC" office:value-type="string">
            <text:p>Purchase date</text:p>
          </table:table-cell>
          <table:table-cell table:style-name="ceHeadC" office:value-type="string">
            <text:p>Cost ($)</text:p>
          </table:table-cell>
          <table:table-cell table:style-name="ceHeadC" office:value-type="string">
            <text:p>Salvage value ($)</text:p>
          </table:table-cell>
          <table:table-cell table:style-name="ceHeadC" office:value-type="string">
            <text:p>Useful life (yrs)</text:p>
          </table:table-cell>
          <table:table-cell table:style-name="ceHeadC" office:value-type="string">
            <text:p>Annual depreciation ($)</text:p>
          </table:table-cell>
          <table:table-cell table:style-name="ceHeadC" office:value-type="string">
            <text:p>Accumulated to date ($)</text:p>
          </table:table-cell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4]=0;0;([.C4]-[.D4])/[.E4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5]=0;0;([.C5]-[.D5])/[.E5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6]=0;0;([.C6]-[.D6])/[.E6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7]=0;0;([.C7]-[.D7])/[.E7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8]=0;0;([.C8]-[.D8])/[.E8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9]=0;0;([.C9]-[.D9])/[.E9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0]=0;0;([.C10]-[.D10])/[.E10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1]=0;0;([.C11]-[.D11])/[.E11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2]=0;0;([.C12]-[.D12])/[.E12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3]=0;0;([.C13]-[.D13])/[.E13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4]=0;0;([.C14]-[.D14])/[.E14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5]=0;0;([.C15]-[.D15])/[.E15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6]=0;0;([.C16]-[.D16])/[.E16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7]=0;0;([.C17]-[.D17])/[.E17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8]=0;0;([.C18]-[.D18])/[.E18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19]=0;0;([.C19]-[.D19])/[.E19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0]=0;0;([.C20]-[.D20])/[.E20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1]=0;0;([.C21]-[.D21])/[.E21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2]=0;0;([.C22]-[.D22])/[.E22])" office:value-type="float"/>
          <table:table-cell table:style-name="ceCurInput"/>
        </table:table-row>
        <table:table-row>
          <table:table-cell table:style-name="ceTextInput"/>
          <table:table-cell table:style-name="ceDateInput"/>
          <table:table-cell table:style-name="ceCurInput"/>
          <table:table-cell table:style-name="ceCurInput"/>
          <table:table-cell table:style-name="ceNumInput"/>
          <table:table-cell table:style-name="ceCur" table:formula="of:=IF([.E23]=0;0;([.C23]-[.D23])/[.E23])" office:value-type="float"/>
          <table:table-cell table:style-name="ceCurInput"/>
        </table:table-row>
        <table:table-row>
          <table:table-cell table:style-name="ceLabelBold" office:value-type="string">
            <text:p>TOTAL ANNUAL DEPRECIATION</text:p>
          </table:table-cell>
          <table:table-cell table:style-name="ceLabel"/>
          <table:table-cell table:style-name="ceLabel"/>
          <table:table-cell table:style-name="ceLabel"/>
          <table:table-cell table:style-name="ceLabel"/>
          <table:table-cell table:style-name="ceCurTotal" table:formula="of:=SUM([.F4:.F23])" office:value-type="float"/>
          <table:table-cell table:style-name="ceCurTotal" table:formula="of:=SUM([.G4:.G23])" office:value-type="float"/>
        </table:table-row>
      </table:table>
      <table:table table:name="Summary">
        <table:table-column table:style-name="cwLabel"/>
        <table:table-column table:style-name="cwCur" table:number-columns-repeated="4"/>
        <table:table-row>
          <table:table-cell table:style-name="ceTitle" table:number-columns-spanned="5" office:value-type="string">
            <text:p>2026 Farm Summary — Dashboard</text:p>
          </table:table-cell>
          <table:covered-table-cell table:number-columns-repeated="4"/>
        </table:table-row>
        <table:table-row>
          <table:table-cell table:style-name="ceNote" table:number-columns-spanned="5" office:value-type="string">
            <text:p>Live snapshot pulled from the P&amp;L tab.</text:p>
          </table:table-cell>
          <table:covered-table-cell table:number-columns-repeated="4"/>
        </table:table-row>
        <table:table-row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WHOLE-FARM TOTALS</text:p>
          </table:table-cell>
          <table:covered-table-cell table:number-columns-repeated="4"/>
        </table:table-row>
        <table:table-row>
          <table:table-cell table:style-name="ceLabel" office:value-type="string">
            <text:p>Total revenue</text:p>
          </table:table-cell>
          <table:table-cell table:style-name="ceCur" table:formula="of:=[$'P&amp;L'.E15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Total operating expenses</text:p>
          </table:table-cell>
          <table:table-cell table:style-name="ceCur" table:formula="of:=[$'P&amp;L'.E31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Total fixed expenses</text:p>
          </table:table-cell>
          <table:table-cell table:style-name="ceCur" table:formula="of:=[$'P&amp;L'.E41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Net" office:value-type="string">
            <text:p>Net profit / (loss)</text:p>
          </table:table-cell>
          <table:table-cell table:style-name="ceCurNet" table:formula="of:=[$'P&amp;L'.E43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Profit margin</text:p>
          </table:table-cell>
          <table:table-cell table:style-name="cePct" table:formula="of:=IF([$'P&amp;L'.E15]=0;0;[$'P&amp;L'.E43]/[$'P&amp;L'.E15])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PRODUCTIVITY</text:p>
          </table:table-cell>
          <table:covered-table-cell table:number-columns-repeated="4"/>
        </table:table-row>
        <table:table-row>
          <table:table-cell table:style-name="ceLabel" office:value-type="string">
            <text:p>Total acres planted</text:p>
          </table:table-cell>
          <table:table-cell table:style-name="ceNum" table:formula="of:=[$'P&amp;L'.E7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Revenue per acre</text:p>
          </table:table-cell>
          <table:table-cell table:style-name="ceCur" table:formula="of:=[$'P&amp;L'.E46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Total cost per acre</text:p>
          </table:table-cell>
          <table:table-cell table:style-name="ceCur" table:formula="of:=[$'P&amp;L'.E47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 office:value-type="string">
            <text:p>Profit per acre</text:p>
          </table:table-cell>
          <table:table-cell table:style-name="ceCur" table:formula="of:=[$'P&amp;L'.E48]" office:value-type="float"/>
          <table:table-cell table:style-name="ceLabel"/>
          <table:table-cell table:style-name="ceLabel"/>
          <table:table-cell table:style-name="ceLabel"/>
        </table:table-row>
        <table:table-row>
          <table:table-cell table:style-name="ceLabel"/>
          <table:table-cell table:style-name="ceLabel"/>
          <table:table-cell table:style-name="ceLabel"/>
          <table:table-cell table:style-name="ceLabel"/>
          <table:table-cell table:style-name="ceLabel"/>
        </table:table-row>
        <table:table-row>
          <table:table-cell table:style-name="ceSection" table:number-columns-spanned="5" office:value-type="string">
            <text:p>BY CROP</text:p>
          </table:table-cell>
          <table:covered-table-cell table:number-columns-repeated="4"/>
        </table:table-row>
        <table:table-row>
          <table:table-cell table:style-name="ceHeadL" office:value-type="string">
            <text:p>Crop</text:p>
          </table:table-cell>
          <table:table-cell table:style-name="ceHead" office:value-type="string">
            <text:p>Revenue</text:p>
          </table:table-cell>
          <table:table-cell table:style-name="ceHead" office:value-type="string">
            <text:p>Total cost</text:p>
          </table:table-cell>
          <table:table-cell table:style-name="ceHead" office:value-type="string">
            <text:p>Net profit</text:p>
          </table:table-cell>
          <table:table-cell table:style-name="ceHead" office:value-type="string">
            <text:p>Profit / acre</text:p>
          </table:table-cell>
        </table:table-row>
        <table:table-row>
          <table:table-cell table:style-name="ceLabelBold" table:formula="of:=[$'P&amp;L'.B5]" office:value-type="float"/>
          <table:table-cell table:style-name="ceCur" table:formula="of:=[$'P&amp;L'.B15]" office:value-type="float"/>
          <table:table-cell table:style-name="ceCur" table:formula="of:=[$'P&amp;L'.B31]+[$'P&amp;L'.B41]" office:value-type="float"/>
          <table:table-cell table:style-name="ceCurTotalLite" table:formula="of:=[$'P&amp;L'.B43]" office:value-type="float"/>
          <table:table-cell table:style-name="ceCur" table:formula="of:=[$'P&amp;L'.B48]" office:value-type="float"/>
        </table:table-row>
        <table:table-row>
          <table:table-cell table:style-name="ceLabelBold" table:formula="of:=[$'P&amp;L'.C5]" office:value-type="float"/>
          <table:table-cell table:style-name="ceCur" table:formula="of:=[$'P&amp;L'.C15]" office:value-type="float"/>
          <table:table-cell table:style-name="ceCur" table:formula="of:=[$'P&amp;L'.C31]+[$'P&amp;L'.C41]" office:value-type="float"/>
          <table:table-cell table:style-name="ceCurTotalLite" table:formula="of:=[$'P&amp;L'.C43]" office:value-type="float"/>
          <table:table-cell table:style-name="ceCur" table:formula="of:=[$'P&amp;L'.C48]" office:value-type="float"/>
        </table:table-row>
        <table:table-row>
          <table:table-cell table:style-name="ceLabelBold" table:formula="of:=[$'P&amp;L'.D5]" office:value-type="float"/>
          <table:table-cell table:style-name="ceCur" table:formula="of:=[$'P&amp;L'.D15]" office:value-type="float"/>
          <table:table-cell table:style-name="ceCur" table:formula="of:=[$'P&amp;L'.D31]+[$'P&amp;L'.D41]" office:value-type="float"/>
          <table:table-cell table:style-name="ceCurTotalLite" table:formula="of:=[$'P&amp;L'.D43]" office:value-type="float"/>
          <table:table-cell table:style-name="ceCur" table:formula="of:=[$'P&amp;L'.D48]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style:font-name="Liberation Sans" fo:font-size="10pt"/>
    </style:default-style>
  </office:styles>
</office:document-styles>
</file>

<file path=meta.xml><?xml version="1.0" encoding="utf-8"?>
<office:document-meta xmlns:office="urn:oasis:names:tc:opendocument:xmlns:office:1.0" xmlns:dc="http://purl.org/dc/elements/1.1/" office:version="1.2">
  <office:meta>
    <dc:title>2026 Farming Ventures - Costs &amp; Profits</dc:title>
  </office:meta>
</office:document-meta>
</file>