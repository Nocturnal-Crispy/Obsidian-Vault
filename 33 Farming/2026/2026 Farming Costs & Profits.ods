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xmlns:number="urn:oasis:names:tc:opendocument:xmlns:datastyle:1.0" xmlns:of="urn:oasis:names:tc:opendocument:xmlns:of:1.2" office:version="1.2">
  <office:automatic-styles>
    <number:number-style style:name="NNUM">
      <number:number number:decimal-places="2" number:min-integer-digits="1" number:grouping="true"/>
    </number:number-style>
    <number:currency-style style:name="NCURN" style:volatile="true">
      <style:text-properties fo:color="#cc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</number:currency-style>
    <number:currency-style style:name="NCUR">
      <number:currency-symbol number:language="en" number:country="US">$</number:currency-symbol>
      <number:number number:decimal-places="2" number:min-integer-digits="1" number:grouping="true"/>
      <style:map style:condition="value()&lt;0" style:apply-style-name="NCURN"/>
    </number:currency-style>
    <style:style style:name="coLabel" style:family="table-column">
      <style:table-column-properties style:column-width="7.6cm"/>
    </style:style>
    <style:style style:name="coData" style:family="table-column">
      <style:table-column-properties style:column-width="3.4cm"/>
    </style:style>
    <style:style style:name="ceTitle" style:family="table-cell">
      <style:text-properties fo:font-size="15pt" fo:font-weight="bold" fo:color="#1f3864"/>
    </style:style>
    <style:style style:name="ceSub" style:family="table-cell">
      <style:text-properties fo:font-size="11pt" fo:font-weight="bold" fo:color="#44546a"/>
    </style:style>
    <style:style style:name="ceNote" style:family="table-cell">
      <style:text-properties fo:font-size="9pt" fo:font-style="italic" fo:color="#808080"/>
    </style:style>
    <style:style style:name="ceHead" style:family="table-cell">
      <style:table-cell-properties fo:background-color="#305496" style:vertical-align="middle" fo:border="0.5pt solid #ffffff"/>
      <style:paragraph-properties fo:text-align="center"/>
      <style:text-properties fo:font-weight="bold" fo:color="#ffffff"/>
    </style:style>
    <style:style style:name="ceHeadL" style:family="table-cell">
      <style:table-cell-properties fo:background-color="#305496" fo:border="0.5pt solid #ffffff"/>
      <style:text-properties fo:font-weight="bold" fo:color="#ffffff"/>
    </style:style>
    <style:style style:name="ceSection" style:family="table-cell">
      <style:table-cell-properties fo:background-color="#d9e1f2" fo:border-top="0.5pt solid #8ea9db" fo:border-bottom="0.5pt solid #8ea9db"/>
      <style:text-properties fo:font-weight="bold" fo:color="#1f3864"/>
    </style:style>
    <style:style style:name="ceLabel" style:family="table-cell">
      <style:text-properties/>
    </style:style>
    <style:style style:name="ceLabelBold" style:family="table-cell">
      <style:text-properties fo:font-weight="bold"/>
    </style:style>
    <style:style style:name="ceLabelNet" style:family="table-cell">
      <style:table-cell-properties fo:background-color="#e2efda" fo:border-top="0.5pt solid #538135" fo:border-bottom="1pt double #538135"/>
      <style:text-properties fo:font-weight="bold" fo:font-size="12pt"/>
    </style:style>
    <style:style style:name="ceCur" style:family="table-cell" style:data-style-name="NCUR">
      <style:text-properties/>
    </style:style>
    <style:style style:name="ceNum" style:family="table-cell" style:data-style-name="NNUM">
      <style:text-properties/>
    </style:style>
    <style:style style:name="ceCurInput" style:family="table-cell" style:data-style-name="NCUR">
      <style:table-cell-properties fo:background-color="#fff2cc" fo:border="0.5pt solid #d6b656"/>
    </style:style>
    <style:style style:name="ceNumInput" style:family="table-cell" style:data-style-name="NNUM">
      <style:table-cell-properties fo:background-color="#fff2cc" fo:border="0.5pt solid #d6b656"/>
    </style:style>
    <style:style style:name="ceCurTotal" style:family="table-cell" style:data-style-name="NCUR">
      <style:table-cell-properties fo:border-top="0.5pt solid #404040"/>
      <style:text-properties fo:font-weight="bold"/>
    </style:style>
    <style:style style:name="ceCurNet" style:family="table-cell" style:data-style-name="NCUR">
      <style:table-cell-properties fo:background-color="#e2efda" fo:border-top="0.5pt solid #538135" fo:border-bottom="1pt double #538135"/>
      <style:text-properties fo:font-weight="bold" fo:font-size="12pt"/>
    </style:style>
  </office:automatic-styles>
  <office:body>
    <office:spreadsheet>
      <table:calculation-settings table:automatic-find-labels="false"/>
      <table:table table:name="Costs &amp; Profits 2026">
        <table:table-column table:style-name="coLabel"/>
        <table:table-column table:style-name="coData" table:number-columns-repeated="4"/>
        <table:table-row>
          <table:table-cell table:style-name="ceTitle" table:number-columns-spanned="5" office:value-type="string">
            <text:p>2026 Farming Ventures — Costs &amp; Profits</text:p>
          </table:table-cell>
          <table:covered-table-cell table:number-columns-repeated="4"/>
        </table:table-row>
        <table:table-row>
          <table:table-cell table:style-name="ceSub" table:number-columns-spanned="5" office:value-type="string">
            <text:p>Income Statement (Profit &amp; Loss)   •   Season 2026</text:p>
          </table:table-cell>
          <table:covered-table-cell table:number-columns-repeated="4"/>
        </table:table-row>
        <table:table-row>
          <table:table-cell table:style-name="ceNote" table:number-columns-spanned="5" office:value-type="string">
            <text:p>Yellow cells = enter your figures.  White cells calculate automatically. Rename "Crop 2 / Crop 3" and add columns as needed.</text:p>
          </table:table-cell>
          <table:covered-table-cell table:number-columns-repeated="4"/>
        </table:table-row>
        <table:table-row>
          <table:table-cell table:style-name="ceLabel"/>
          <table:table-cell table:number-columns-repeated="4"/>
        </table:table-row>
        <table:table-row>
          <table:table-cell table:style-name="ceHeadL" office:value-type="string">
            <text:p>ITEM</text:p>
          </table:table-cell>
          <table:table-cell table:style-name="ceHead" office:value-type="string">
            <text:p>Soybeans</text:p>
          </table:table-cell>
          <table:table-cell table:style-name="ceHead" office:value-type="string">
            <text:p>Crop 2</text:p>
          </table:table-cell>
          <table:table-cell table:style-name="ceHead" office:value-type="string">
            <text:p>Crop 3</text:p>
          </table:table-cell>
          <table:table-cell table:style-name="ceHead" office:value-type="string">
            <text:p>TOTAL (all crops)</text:p>
          </table:table-cell>
        </table:table-row>
        <table:table-row>
          <table:table-cell table:style-name="ceSection" table:number-columns-spanned="5" office:value-type="string">
            <text:p>PRODUCTION</text:p>
          </table:table-cell>
          <table:covered-table-cell table:number-columns-repeated="4"/>
        </table:table-row>
        <table:table-row>
          <table:table-cell table:style-name="ceLabel" office:value-type="string">
            <text:p>Acres planted</text:p>
          </table:table-cell>
          <table:table-cell table:style-name="ceNumInput"/>
          <table:table-cell table:style-name="ceNumInput"/>
          <table:table-cell table:style-name="ceNumInput"/>
          <table:table-cell table:style-name="ceNum" table:formula="of:=SUM([.B7:.D7])" office:value-type="float"/>
        </table:table-row>
        <table:table-row>
          <table:table-cell table:style-name="ceLabel" office:value-type="string">
            <text:p>Yield per acre (units/ac)</text:p>
          </table:table-cell>
          <table:table-cell table:style-name="ceNumInput"/>
          <table:table-cell table:style-name="ceNumInput"/>
          <table:table-cell table:style-name="ceNumInput"/>
          <table:table-cell table:style-name="ceNumInput"/>
        </table:table-row>
        <table:table-row>
          <table:table-cell table:style-name="ceLabel" office:value-type="string">
            <text:p>Total production (units)</text:p>
          </table:table-cell>
          <table:table-cell table:style-name="ceNum" table:formula="of:=[.B7]*[.B8]" office:value-type="float"/>
          <table:table-cell table:style-name="ceNum" table:formula="of:=[.C7]*[.C8]" office:value-type="float"/>
          <table:table-cell table:style-name="ceNum" table:formula="of:=[.D7]*[.D8]" office:value-type="float"/>
          <table:table-cell table:style-name="ceNum"/>
        </table:table-row>
        <table:table-row>
          <table:table-cell table:style-name="ceLabel" office:value-type="string">
            <text:p>Sale price per unit ($)</text:p>
          </table:table-cell>
          <table:table-cell table:style-name="ceCurInput"/>
          <table:table-cell table:style-name="ceCurInput"/>
          <table:table-cell table:style-name="ceCurInput"/>
          <table:table-cell table:style-name="ceCurInput"/>
        </table:table-row>
        <table:table-row>
          <table:table-cell table:style-name="ceLabel"/>
          <table:table-cell table:number-columns-repeated="4"/>
        </table:table-row>
        <table:table-row>
          <table:table-cell table:style-name="ceSection" table:number-columns-spanned="5" office:value-type="string">
            <text:p>REVENUE</text:p>
          </table:table-cell>
          <table:covered-table-cell table:number-columns-repeated="4"/>
        </table:table-row>
        <table:table-row>
          <table:table-cell table:style-name="ceLabel" office:value-type="string">
            <text:p>Crop sales</text:p>
          </table:table-cell>
          <table:table-cell table:style-name="ceCur" table:formula="of:=[.B9]*[.B10]" office:value-type="float"/>
          <table:table-cell table:style-name="ceCur" table:formula="of:=[.C9]*[.C10]" office:value-type="float"/>
          <table:table-cell table:style-name="ceCur" table:formula="of:=[.D9]*[.D10]" office:value-type="float"/>
          <table:table-cell table:style-name="ceCur" table:formula="of:=SUM([.B13:.D13])" office:value-type="float"/>
        </table:table-row>
        <table:table-row>
          <table:table-cell table:style-name="ceLabel" office:value-type="string">
            <text:p>Government payments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14:.D14])" office:value-type="float"/>
        </table:table-row>
        <table:table-row>
          <table:table-cell table:style-name="ceLabel" office:value-type="string">
            <text:p>Crop insurance proceeds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15:.D15])" office:value-type="float"/>
        </table:table-row>
        <table:table-row>
          <table:table-cell table:style-name="ceLabel" office:value-type="string">
            <text:p>Other farm income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16:.D16])" office:value-type="float"/>
        </table:table-row>
        <table:table-row>
          <table:table-cell table:style-name="ceLabelBold" office:value-type="string">
            <text:p>TOTAL REVENUE</text:p>
          </table:table-cell>
          <table:table-cell table:style-name="ceCurTotal" table:formula="of:=SUM([.B13:.B16])" office:value-type="float"/>
          <table:table-cell table:style-name="ceCurTotal" table:formula="of:=SUM([.C13:.C16])" office:value-type="float"/>
          <table:table-cell table:style-name="ceCurTotal" table:formula="of:=SUM([.D13:.D16])" office:value-type="float"/>
          <table:table-cell table:style-name="ceCurTotal" table:formula="of:=SUM([.B17:.D17])" office:value-type="float"/>
        </table:table-row>
        <table:table-row>
          <table:table-cell table:style-name="ceLabel"/>
          <table:table-cell table:number-columns-repeated="4"/>
        </table:table-row>
        <table:table-row>
          <table:table-cell table:style-name="ceSection" table:number-columns-spanned="5" office:value-type="string">
            <text:p>OPERATING (VARIABLE) EXPENSES</text:p>
          </table:table-cell>
          <table:covered-table-cell table:number-columns-repeated="4"/>
        </table:table-row>
        <table:table-row>
          <table:table-cell table:style-name="ceLabel" office:value-type="string">
            <text:p>Seed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20:.D20])" office:value-type="float"/>
        </table:table-row>
        <table:table-row>
          <table:table-cell table:style-name="ceLabel" office:value-type="string">
            <text:p>Fertilizer &amp; lime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21:.D21])" office:value-type="float"/>
        </table:table-row>
        <table:table-row>
          <table:table-cell table:style-name="ceLabel" office:value-type="string">
            <text:p>Chemicals (herbicide / pesticide)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22:.D22])" office:value-type="float"/>
        </table:table-row>
        <table:table-row>
          <table:table-cell table:style-name="ceLabel" office:value-type="string">
            <text:p>Crop insurance premiums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23:.D23])" office:value-type="float"/>
        </table:table-row>
        <table:table-row>
          <table:table-cell table:style-name="ceLabel" office:value-type="string">
            <text:p>Fuel &amp; oil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24:.D24])" office:value-type="float"/>
        </table:table-row>
        <table:table-row>
          <table:table-cell table:style-name="ceLabel" office:value-type="string">
            <text:p>Custom hire / machine work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25:.D25])" office:value-type="float"/>
        </table:table-row>
        <table:table-row>
          <table:table-cell table:style-name="ceLabel" office:value-type="string">
            <text:p>Repairs &amp; maintenance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26:.D26])" office:value-type="float"/>
        </table:table-row>
        <table:table-row>
          <table:table-cell table:style-name="ceLabel" office:value-type="string">
            <text:p>Drying &amp; storage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27:.D27])" office:value-type="float"/>
        </table:table-row>
        <table:table-row>
          <table:table-cell table:style-name="ceLabel" office:value-type="string">
            <text:p>Hauling / trucking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28:.D28])" office:value-type="float"/>
        </table:table-row>
        <table:table-row>
          <table:table-cell table:style-name="ceLabel" office:value-type="string">
            <text:p>Hired labor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29:.D29])" office:value-type="float"/>
        </table:table-row>
        <table:table-row>
          <table:table-cell table:style-name="ceLabel" office:value-type="string">
            <text:p>Land rent / lease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30:.D30])" office:value-type="float"/>
        </table:table-row>
        <table:table-row>
          <table:table-cell table:style-name="ceLabel" office:value-type="string">
            <text:p>Operating loan interest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31:.D31])" office:value-type="float"/>
        </table:table-row>
        <table:table-row>
          <table:table-cell table:style-name="ceLabel" office:value-type="string">
            <text:p>Supplies &amp; miscellaneous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32:.D32])" office:value-type="float"/>
        </table:table-row>
        <table:table-row>
          <table:table-cell table:style-name="ceLabelBold" office:value-type="string">
            <text:p>TOTAL OPERATING EXPENSES</text:p>
          </table:table-cell>
          <table:table-cell table:style-name="ceCurTotal" table:formula="of:=SUM([.B20:.B32])" office:value-type="float"/>
          <table:table-cell table:style-name="ceCurTotal" table:formula="of:=SUM([.C20:.C32])" office:value-type="float"/>
          <table:table-cell table:style-name="ceCurTotal" table:formula="of:=SUM([.D20:.D32])" office:value-type="float"/>
          <table:table-cell table:style-name="ceCurTotal" table:formula="of:=SUM([.B33:.D33])" office:value-type="float"/>
        </table:table-row>
        <table:table-row>
          <table:table-cell table:style-name="ceLabel"/>
          <table:table-cell table:number-columns-repeated="4"/>
        </table:table-row>
        <table:table-row>
          <table:table-cell table:style-name="ceLabelBold" office:value-type="string">
            <text:p>GROSS MARGIN  (Revenue − Operating)</text:p>
          </table:table-cell>
          <table:table-cell table:style-name="ceCurTotal" table:formula="of:=[.B17]-[.B33]" office:value-type="float"/>
          <table:table-cell table:style-name="ceCurTotal" table:formula="of:=[.C17]-[.C33]" office:value-type="float"/>
          <table:table-cell table:style-name="ceCurTotal" table:formula="of:=[.D17]-[.D33]" office:value-type="float"/>
          <table:table-cell table:style-name="ceCurTotal" table:formula="of:=[.E17]-[.E33]" office:value-type="float"/>
        </table:table-row>
        <table:table-row>
          <table:table-cell table:style-name="ceLabel"/>
          <table:table-cell table:number-columns-repeated="4"/>
        </table:table-row>
        <table:table-row>
          <table:table-cell table:style-name="ceSection" table:number-columns-spanned="5" office:value-type="string">
            <text:p>FIXED / OVERHEAD EXPENSES</text:p>
          </table:table-cell>
          <table:covered-table-cell table:number-columns-repeated="4"/>
        </table:table-row>
        <table:table-row>
          <table:table-cell table:style-name="ceLabel" office:value-type="string">
            <text:p>Property / land taxes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38:.D38])" office:value-type="float"/>
        </table:table-row>
        <table:table-row>
          <table:table-cell table:style-name="ceLabel" office:value-type="string">
            <text:p>Farm &amp; liability insurance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39:.D39])" office:value-type="float"/>
        </table:table-row>
        <table:table-row>
          <table:table-cell table:style-name="ceLabel" office:value-type="string">
            <text:p>Depreciation (equipment &amp; buildings)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40:.D40])" office:value-type="float"/>
        </table:table-row>
        <table:table-row>
          <table:table-cell table:style-name="ceLabel" office:value-type="string">
            <text:p>Term loan interest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41:.D41])" office:value-type="float"/>
        </table:table-row>
        <table:table-row>
          <table:table-cell table:style-name="ceLabel" office:value-type="string">
            <text:p>Other overhead</text:p>
          </table:table-cell>
          <table:table-cell table:style-name="ceCurInput"/>
          <table:table-cell table:style-name="ceCurInput"/>
          <table:table-cell table:style-name="ceCurInput"/>
          <table:table-cell table:style-name="ceCurInput" table:formula="of:=SUM([.B42:.D42])" office:value-type="float"/>
        </table:table-row>
        <table:table-row>
          <table:table-cell table:style-name="ceLabelBold" office:value-type="string">
            <text:p>TOTAL FIXED EXPENSES</text:p>
          </table:table-cell>
          <table:table-cell table:style-name="ceCurTotal" table:formula="of:=SUM([.B38:.B42])" office:value-type="float"/>
          <table:table-cell table:style-name="ceCurTotal" table:formula="of:=SUM([.C38:.C42])" office:value-type="float"/>
          <table:table-cell table:style-name="ceCurTotal" table:formula="of:=SUM([.D38:.D42])" office:value-type="float"/>
          <table:table-cell table:style-name="ceCurTotal" table:formula="of:=SUM([.B43:.D43])" office:value-type="float"/>
        </table:table-row>
        <table:table-row>
          <table:table-cell table:style-name="ceLabel"/>
          <table:table-cell table:number-columns-repeated="4"/>
        </table:table-row>
        <table:table-row>
          <table:table-cell table:style-name="ceLabelNet" office:value-type="string">
            <text:p>NET PROFIT / (LOSS)</text:p>
          </table:table-cell>
          <table:table-cell table:style-name="ceCurNet" table:formula="of:=[.B17]-[.B33]-[.B43]" office:value-type="float"/>
          <table:table-cell table:style-name="ceCurNet" table:formula="of:=[.C17]-[.C33]-[.C43]" office:value-type="float"/>
          <table:table-cell table:style-name="ceCurNet" table:formula="of:=[.D17]-[.D33]-[.D43]" office:value-type="float"/>
          <table:table-cell table:style-name="ceCurNet" table:formula="of:=[.E17]-[.E33]-[.E43]" office:value-type="float"/>
        </table:table-row>
        <table:table-row>
          <table:table-cell table:style-name="ceLabel"/>
          <table:table-cell table:number-columns-repeated="4"/>
        </table:table-row>
        <table:table-row>
          <table:table-cell table:style-name="ceSection" table:number-columns-spanned="5" office:value-type="string">
            <text:p>PER-ACRE METRICS</text:p>
          </table:table-cell>
          <table:covered-table-cell table:number-columns-repeated="4"/>
        </table:table-row>
        <table:table-row>
          <table:table-cell table:style-name="ceLabel" office:value-type="string">
            <text:p>Revenue per acre</text:p>
          </table:table-cell>
          <table:table-cell table:style-name="ceCur" table:formula="of:=IF([.B7]=0;0;[.B17]/[.B7])" office:value-type="float"/>
          <table:table-cell table:style-name="ceCur" table:formula="of:=IF([.C7]=0;0;[.C17]/[.C7])" office:value-type="float"/>
          <table:table-cell table:style-name="ceCur" table:formula="of:=IF([.D7]=0;0;[.D17]/[.D7])" office:value-type="float"/>
          <table:table-cell table:style-name="ceCur" table:formula="of:=IF([.E7]=0;0;[.E17]/[.E7])" office:value-type="float"/>
        </table:table-row>
        <table:table-row>
          <table:table-cell table:style-name="ceLabel" office:value-type="string">
            <text:p>Total cost per acre</text:p>
          </table:table-cell>
          <table:table-cell table:style-name="ceCur" table:formula="of:=IF([.B7]=0;0;([.B33]+[.B43])/[.B7])" office:value-type="float"/>
          <table:table-cell table:style-name="ceCur" table:formula="of:=IF([.C7]=0;0;([.C33]+[.C43])/[.C7])" office:value-type="float"/>
          <table:table-cell table:style-name="ceCur" table:formula="of:=IF([.D7]=0;0;([.D33]+[.D43])/[.D7])" office:value-type="float"/>
          <table:table-cell table:style-name="ceCur" table:formula="of:=IF([.E7]=0;0;([.E33]+[.E43])/[.E7])" office:value-type="float"/>
        </table:table-row>
        <table:table-row>
          <table:table-cell table:style-name="ceLabel" office:value-type="string">
            <text:p>Profit per acre</text:p>
          </table:table-cell>
          <table:table-cell table:style-name="ceCur" table:formula="of:=IF([.B7]=0;0;[.B45]/[.B7])" office:value-type="float"/>
          <table:table-cell table:style-name="ceCur" table:formula="of:=IF([.C7]=0;0;[.C45]/[.C7])" office:value-type="float"/>
          <table:table-cell table:style-name="ceCur" table:formula="of:=IF([.D7]=0;0;[.D45]/[.D7])" office:value-type="float"/>
          <table:table-cell table:style-name="ceCur" table:formula="of:=IF([.E7]=0;0;[.E45]/[.E7])" office:value-type="float"/>
        </table:table-row>
        <table:table-row>
          <table:table-cell table:style-name="ceLabel" office:value-type="string">
            <text:p>Breakeven price per unit</text:p>
          </table:table-cell>
          <table:table-cell table:style-name="ceCur" table:formula="of:=IF([.B9]=0;0;([.B33]+[.B43])/[.B9])" office:value-type="float"/>
          <table:table-cell table:style-name="ceCur" table:formula="of:=IF([.C9]=0;0;([.C33]+[.C43])/[.C9])" office:value-type="float"/>
          <table:table-cell table:style-name="ceCur" table:formula="of:=IF([.D9]=0;0;([.D33]+[.D43])/[.D9])" office:value-type="float"/>
          <table:table-cell table:style-name="ceCur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default-style style:family="table-cell">
      <style:text-properties style:font-name="Liberation Sans" fo:font-size="10pt"/>
    </style:default-style>
  </office:styles>
</office:document-styles>
</file>

<file path=meta.xml><?xml version="1.0" encoding="utf-8"?>
<office:document-meta xmlns:office="urn:oasis:names:tc:opendocument:xmlns:office:1.0" xmlns:dc="http://purl.org/dc/elements/1.1/" office:version="1.2">
  <office:meta>
    <dc:title>2026 Farming Ventures - Costs &amp; Profits</dc:title>
  </office:meta>
</office:document-meta>
</file>