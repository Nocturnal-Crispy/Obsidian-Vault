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925in"/>
    </style:style>
    <style:style style:name="co2" style:family="table-column">
      <style:table-column-properties fo:break-before="auto" style:column-width="1.3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2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2598in"/>
    </style:style>
    <style:style style:name="co7" style:family="table-column">
      <style:table-column-properties fo:break-before="auto" style:column-width="2.3626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Title" style:family="table-cell" style:parent-style-name="Default">
      <style:text-properties fo:color="#1f3864" fo:font-size="15pt" fo:font-weight="bold"/>
    </style:style>
    <style:style style:name="ceSub" style:family="table-cell" style:parent-style-name="Default">
      <style:text-properties fo:color="#44546a" fo:font-size="11pt" fo:font-weight="bold"/>
    </style:style>
    <style:style style:name="ceNote" style:family="table-cell" style:parent-style-name="Default">
      <style:text-properties fo:color="#808080" fo:font-size="9pt" fo:font-style="italic"/>
    </style:style>
    <style:style style:name="ceHeadL" style:family="table-cell" style:parent-style-name="Default">
      <style:table-cell-properties fo:background-color="#305496" fo:border="0.51pt solid #ffffff"/>
      <style:text-properties fo:color="#ffffff" fo:font-weight="bold"/>
    </style:style>
    <style:style style:name="ceSection" style:family="table-cell" style:parent-style-name="Default">
      <style:table-cell-properties fo:border-bottom="0.51pt solid #8ea9db" fo:background-color="#d9e1f2" fo:border-left="none" fo:border-right="none" fo:border-top="0.51pt solid #8ea9db"/>
      <style:text-properties fo:color="#1f3864" fo:font-weight="bold"/>
    </style:style>
    <style:style style:name="ceLabelBold" style:family="table-cell" style:parent-style-name="Default">
      <style:text-properties fo:font-weight="bold"/>
    </style:style>
    <style:style style:name="ceLabelNet" style:family="table-cell" style:parent-style-name="Default">
      <style:table-cell-properties fo:border-bottom="0.99pt double #538135" style:border-line-width-bottom="0.0047in 0.0047in 0.0047in" fo:background-color="#e2efda" fo:border-left="none" fo:border-right="none" fo:border-top="0.51pt solid #538135"/>
      <style:text-properties fo:font-size="12pt" fo:font-weight="bold"/>
    </style:style>
    <style:style style:name="ceHead" style:family="table-cell" style:parent-style-name="Default">
      <style:table-cell-properties fo:background-color="#305496" style:text-align-source="fix" style:repeat-content="false" fo:border="0.51pt solid #ffffff" style:vertical-align="middle"/>
      <style:paragraph-properties fo:text-align="center"/>
      <style:text-properties fo:color="#ffffff" fo:font-weight="bold"/>
    </style:style>
    <style:style style:name="ceNumInput" style:family="table-cell" style:parent-style-name="Default" style:data-style-name="N4">
      <style:table-cell-properties fo:background-color="#fff2cc" fo:border="0.51pt solid #d6b656"/>
    </style:style>
    <style:style style:name="ceCur" style:family="table-cell" style:parent-style-name="Default" style:data-style-name="N130"/>
    <style:style style:name="ceCurInput" style:family="table-cell" style:parent-style-name="Default" style:data-style-name="N130">
      <style:table-cell-properties fo:background-color="#fff2cc" fo:border="0.51pt solid #d6b656"/>
    </style:style>
    <style:style style:name="ceCurTotal" style:family="table-cell" style:parent-style-name="Default" style:data-style-name="N130">
      <style:table-cell-properties fo:border-bottom="none" fo:border-left="none" fo:border-right="none" fo:border-top="0.51pt solid #404040"/>
      <style:text-properties fo:font-weight="bold"/>
    </style:style>
    <style:style style:name="ceCurNet" style:family="table-cell" style:parent-style-name="Default" style:data-style-name="N130">
      <style:table-cell-properties fo:border-bottom="0.99pt double #538135" style:border-line-width-bottom="0.0047in 0.0047in 0.0047in" fo:background-color="#e2efda" fo:border-left="none" fo:border-right="none" fo:border-top="0.51pt solid #538135"/>
      <style:text-properties fo:font-size="12pt" fo:font-weight="bold"/>
    </style:style>
    <style:style style:name="ceNum" style:family="table-cell" style:parent-style-name="Default" style:data-style-name="N4"/>
    <style:style style:name="ceNumTotal" style:family="table-cell" style:parent-style-name="Default" style:data-style-name="N4">
      <style:text-properties fo:font-weight="bold"/>
    </style:style>
    <style:style style:name="ceCurTotalLite" style:family="table-cell" style:parent-style-name="Default" style:data-style-name="N130">
      <style:text-properties fo:font-weight="bold"/>
    </style:style>
    <style:style style:name="ceDateInput" style:family="table-cell" style:parent-style-name="Default" style:data-style-name="N49">
      <style:table-cell-properties fo:background-color="#fff2cc" fo:border="0.51pt solid #d6b656"/>
    </style:style>
    <style:style style:name="ceTextInput" style:family="table-cell" style:parent-style-name="Default">
      <style:table-cell-properties fo:background-color="#fff2cc" fo:border="0.51pt solid #d6b656"/>
    </style:style>
    <style:style style:name="ceNoteHelp" style:family="table-cell" style:parent-style-name="Default">
      <style:text-properties fo:color="#aaaaaa" fo:font-size="8pt" fo:font-style="italic"/>
    </style:style>
    <style:style style:name="ceHelp" style:family="table-cell" style:parent-style-name="Default">
      <style:table-cell-properties fo:background-color="#f2f2f2" fo:border="0.51pt solid #cccccc"/>
      <style:text-properties fo:color="#808080" fo:font-size="9pt"/>
    </style:style>
    <style:style style:name="cePct" style:family="table-cell" style:parent-style-name="Default" style:data-style-name="N131">
      <style:text-properties fo:font-weight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Sales.$H$2:.$H$5])" table:allow-empty-cell="true" table:display-list="unsorted" table:base-cell-address="Sales.B3"/>
        <table:content-validation table:name="val2" table:condition="of:cell-content-is-in-list([$Expenses.$G$2:.$G$5])" table:allow-empty-cell="true" table:display-list="unsorted" table:base-cell-address="Expenses.B3"/>
        <table:content-validation table:name="val3" table:condition="of:cell-content-is-in-list(&quot;Seed&quot;;&quot;Fertilizer &amp; lime&quot;;&quot;Chemicals (herbicide / pesticide)&quot;;&quot;Crop insurance premiums&quot;;&quot;Fuel &amp; oil&quot;;&quot;Custom hire / machine work&quot;;&quot;Repairs &amp; maintenance&quot;;&quot;Drying &amp; storage&quot;;&quot;Hauling / trucking&quot;;&quot;Hired labor&quot;;&quot;Land rent / lease&quot;;&quot;Operating loan interest&quot;;&quot;Supplies &amp; miscellaneous&quot;;&quot;Property / land taxes&quot;;&quot;Farm &amp; liability insurance&quot;;&quot;Depreciation (equipment &amp; buildings)&quot;;&quot;Term loan interest&quot;;&quot;Other overhead&quot;)" table:allow-empty-cell="true" table:display-list="unsorted" table:base-cell-address="Expenses.C3"/>
      </table:content-validations>
      <table:table table:name="P&amp;L" table:style-name="ta1">
        <table:table-column table:style-name="co1" table:default-cell-style-name="Default"/>
        <table:table-column table:style-name="co2" table:number-columns-repeated="4" table:default-cell-style-name="ceCur"/>
        <table:table-column table:style-name="co2" table:default-cell-style-name="ceCurTotalLite"/>
        <table:table-row table:style-name="ro1">
          <table:table-cell table:style-name="ceTitle" office:value-type="string" calcext:value-type="string" table:number-columns-spanned="6" table:number-rows-spanned="1">
            <text:p>2026 Farming Ventures — Costs &amp; Profits</text:p>
          </table:table-cell>
          <table:covered-table-cell table:number-columns-repeated="5" table:style-name="Default"/>
        </table:table-row>
        <table:table-row table:style-name="ro2">
          <table:table-cell table:style-name="ceSub" office:value-type="string" calcext:value-type="string" table:number-columns-spanned="6" table:number-rows-spanned="1">
            <text:p>Income Statement (P&amp;L) <text:s text:c="2"/>• <text:s text:c="2"/>Season 2026</text:p>
          </table:table-cell>
          <table:covered-table-cell table:number-columns-repeated="5" table:style-name="Default"/>
        </table:table-row>
        <table:table-row table:style-name="ro3">
          <table:table-cell table:style-name="ceNote" office:value-type="string" calcext:value-type="string" table:number-columns-spanned="6" table:number-rows-spanned="1">
            <text:p>Yellow = type here. <text:s/>White = auto-calculated. <text:s/>Crop sales pull from the Sales tab; every expense line pulls from the Expenses tab. Use the No Crop column for costs not tied to a crop (repairs, overhead). The TOTAL column counts every logged cost. Rename Crop 2 / Crop 3 below and pick the same names in the logs.</text:p>
          </table:table-cell>
          <table:covered-table-cell table:number-columns-repeated="5" table:style-name="Default"/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HeadL" office:value-type="string" calcext:value-type="string">
            <text:p>ITEM</text:p>
          </table:table-cell>
          <table:table-cell table:style-name="ceHead" office:value-type="string" calcext:value-type="string">
            <text:p>Soybeans</text:p>
          </table:table-cell>
          <table:table-cell table:style-name="ceHead" office:value-type="string" calcext:value-type="string">
            <text:p>Corn</text:p>
          </table:table-cell>
          <table:table-cell table:style-name="ceHead" office:value-type="string" calcext:value-type="string">
            <text:p>Hay</text:p>
          </table:table-cell>
          <table:table-cell table:style-name="ceHead" office:value-type="string" calcext:value-type="string">
            <text:p>No Crop</text:p>
          </table:table-cell>
          <table:table-cell table:style-name="ceHead" office:value-type="string" calcext:value-type="string">
            <text:p>TOTAL (all crops)</text:p>
          </table:table-cell>
        </table:table-row>
        <table:table-row table:style-name="ro3">
          <table:table-cell table:style-name="ceSection" office:value-type="string" calcext:value-type="string" table:number-columns-spanned="6" table:number-rows-spanned="1">
            <text:p>PRODUCTION</text:p>
          </table:table-cell>
          <table:covered-table-cell table:number-columns-repeated="5" table:style-name="Default"/>
        </table:table-row>
        <table:table-row table:style-name="ro3">
          <table:table-cell office:value-type="string" calcext:value-type="string">
            <text:p>Acres planted</text:p>
          </table:table-cell>
          <table:table-cell table:style-name="ceNumInput" office:value-type="float" office:value="26" calcext:value-type="float">
            <text:p>26.00</text:p>
          </table:table-cell>
          <table:table-cell table:style-name="ceNumInput" table:number-columns-repeated="2"/>
          <table:table-cell table:style-name="ceNum"/>
          <table:table-cell table:style-name="ceNumTotal" table:formula="of:=SUM([.B7:.E7])" office:value-type="float" office:value="26" calcext:value-type="float">
            <text:p>26.00</text:p>
          </table:table-cell>
        </table:table-row>
        <table:table-row table:style-name="ro3">
          <table:table-cell office:value-type="string" calcext:value-type="string">
            <text:p>Total production (units harvested)</text:p>
          </table:table-cell>
          <table:table-cell table:style-name="ceNumInput" office:value-type="float" office:value="0" calcext:value-type="float">
            <text:p>0.00</text:p>
          </table:table-cell>
          <table:table-cell table:style-name="ceNumInput" table:number-columns-repeated="2"/>
          <table:table-cell table:style-name="ceNum"/>
          <table:table-cell table:style-name="ceNumTotal" table:formula="of:=SUM([.B8:.E8])" office:value-type="float" office:value="0" calcext:value-type="float">
            <text:p>0.00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Section" office:value-type="string" calcext:value-type="string" table:number-columns-spanned="6" table:number-rows-spanned="1">
            <text:p>REVENUE</text:p>
          </table:table-cell>
          <table:covered-table-cell table:number-columns-repeated="5" table:style-name="Default"/>
        </table:table-row>
        <table:table-row table:style-name="ro3">
          <table:table-cell office:value-type="string" calcext:value-type="string">
            <text:p>Crop sales <text:s/>(from Sales tab)</text:p>
          </table:table-cell>
          <table:table-cell table:formula="of:=SUMIF([$Sales.B3:.B62];[.B5];[$Sales.F3:.F62])" office:value-type="currency" office:currency="USD" office:value="0" calcext:value-type="currency">
            <text:p>$0.00</text:p>
          </table:table-cell>
          <table:table-cell table:formula="of:=SUMIF([$Sales.B3:.B62];[.C5];[$Sales.F3:.F62])" office:value-type="currency" office:currency="USD" office:value="0" calcext:value-type="currency">
            <text:p>$0.00</text:p>
          </table:table-cell>
          <table:table-cell table:formula="of:=SUMIF([$Sales.B3:.B62];[.D5];[$Sales.F3:.F62])" office:value-type="currency" office:currency="USD" office:value="0" calcext:value-type="currency">
            <text:p>$0.00</text:p>
          </table:table-cell>
          <table:table-cell table:formula="of:=SUMIF([$Sales.B3:.B62];[.E5];[$Sales.F3:.F62])" office:value-type="currency" office:currency="USD" office:value="0" calcext:value-type="currency">
            <text:p>$0.00</text:p>
          </table:table-cell>
          <table:table-cell table:formula="of:=SUM([.B11:.E11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Government payments</text:p>
          </table:table-cell>
          <table:table-cell table:style-name="ceCurInput" table:number-columns-repeated="4"/>
          <table:table-cell table:formula="of:=SUM([.B12:.E1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rop insurance proceeds</text:p>
          </table:table-cell>
          <table:table-cell table:style-name="ceCurInput" table:number-columns-repeated="4"/>
          <table:table-cell table:formula="of:=SUM([.B13:.E13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Other farm income</text:p>
          </table:table-cell>
          <table:table-cell table:style-name="ceCurInput" table:number-columns-repeated="4"/>
          <table:table-cell table:formula="of:=SUM([.B14:.E14])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office:value-type="string" calcext:value-type="string">
            <text:p>TOTAL REVENUE</text:p>
          </table:table-cell>
          <table:table-cell table:style-name="ceCurTotal" table:formula="of:=SUM([.B11:.B14])" office:value-type="currency" office:currency="USD" office:value="0" calcext:value-type="currency">
            <text:p>$0.00</text:p>
          </table:table-cell>
          <table:table-cell table:style-name="ceCurTotal" table:formula="of:=SUM([.C11:.C14])" office:value-type="currency" office:currency="USD" office:value="0" calcext:value-type="currency">
            <text:p>$0.00</text:p>
          </table:table-cell>
          <table:table-cell table:style-name="ceCurTotal" table:formula="of:=SUM([.D11:.D14])" office:value-type="currency" office:currency="USD" office:value="0" calcext:value-type="currency">
            <text:p>$0.00</text:p>
          </table:table-cell>
          <table:table-cell table:style-name="ceCurTotal" table:formula="of:=SUM([.E11:.E14])" office:value-type="currency" office:currency="USD" office:value="0" calcext:value-type="currency">
            <text:p>$0.00</text:p>
          </table:table-cell>
          <table:table-cell table:style-name="ceCurTotal" table:formula="of:=SUM([.B15:.E15])" office:value-type="currency" office:currency="USD" office:value="0" calcext:value-type="currency">
            <text:p>$0.00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Section" office:value-type="string" calcext:value-type="string" table:number-columns-spanned="6" table:number-rows-spanned="1">
            <text:p>OPERATING (VARIABLE) EXPENSES</text:p>
          </table:table-cell>
          <table:covered-table-cell table:number-columns-repeated="5" table:style-name="Default"/>
        </table:table-row>
        <table:table-row table:style-name="ro3">
          <table:table-cell office:value-type="string" calcext:value-type="string">
            <text:p>Seed</text:p>
          </table:table-cell>
          <table:table-cell table:formula="of:=SUMIFS([$Expenses.E3:.E82];[$Expenses.C3:.C82];[.A18];[$Expenses.B3:.B82];[.B5])" office:value-type="currency" office:currency="USD" office:value="2025" calcext:value-type="currency">
            <text:p>$2,025.00</text:p>
          </table:table-cell>
          <table:table-cell table:formula="of:=SUMIFS([$Expenses.E3:.E82];[$Expenses.C3:.C82];[.A18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18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18];[$Expenses.B3:.B82];[.E5])" office:value-type="currency" office:currency="USD" office:value="0" calcext:value-type="currency">
            <text:p>$0.00</text:p>
          </table:table-cell>
          <table:table-cell table:formula="of:=SUMIF([$Expenses.C3:.C82];[.A18];[$Expenses.E3:.E82])" office:value-type="currency" office:currency="USD" office:value="2025" calcext:value-type="currency">
            <text:p>$2,025.00</text:p>
          </table:table-cell>
        </table:table-row>
        <table:table-row table:style-name="ro3">
          <table:table-cell office:value-type="string" calcext:value-type="string">
            <text:p>Fertilizer &amp; lime</text:p>
          </table:table-cell>
          <table:table-cell table:formula="of:=SUMIFS([$Expenses.E3:.E82];[$Expenses.C3:.C82];[.A19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19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19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19];[$Expenses.B3:.B82];[.E5])" office:value-type="currency" office:currency="USD" office:value="0" calcext:value-type="currency">
            <text:p>$0.00</text:p>
          </table:table-cell>
          <table:table-cell table:formula="of:=SUMIF([$Expenses.C3:.C82];[.A19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hemicals (herbicide / pesticide)</text:p>
          </table:table-cell>
          <table:table-cell table:formula="of:=SUMIFS([$Expenses.E3:.E82];[$Expenses.C3:.C82];[.A20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0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0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0];[$Expenses.B3:.B82];[.E5])" office:value-type="currency" office:currency="USD" office:value="0" calcext:value-type="currency">
            <text:p>$0.00</text:p>
          </table:table-cell>
          <table:table-cell table:formula="of:=SUMIF([$Expenses.C3:.C82];[.A20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rop insurance premiums</text:p>
          </table:table-cell>
          <table:table-cell table:formula="of:=SUMIFS([$Expenses.E3:.E82];[$Expenses.C3:.C82];[.A21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1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1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1];[$Expenses.B3:.B82];[.E5])" office:value-type="currency" office:currency="USD" office:value="0" calcext:value-type="currency">
            <text:p>$0.00</text:p>
          </table:table-cell>
          <table:table-cell table:formula="of:=SUMIF([$Expenses.C3:.C82];[.A21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Fuel &amp; oil</text:p>
          </table:table-cell>
          <table:table-cell table:formula="of:=SUMIFS([$Expenses.E3:.E82];[$Expenses.C3:.C82];[.A22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2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2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2];[$Expenses.B3:.B82];[.E5])" office:value-type="currency" office:currency="USD" office:value="0" calcext:value-type="currency">
            <text:p>$0.00</text:p>
          </table:table-cell>
          <table:table-cell table:formula="of:=SUMIF([$Expenses.C3:.C82];[.A22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Custom hire / machine work</text:p>
          </table:table-cell>
          <table:table-cell table:formula="of:=SUMIFS([$Expenses.E3:.E82];[$Expenses.C3:.C82];[.A23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3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3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3];[$Expenses.B3:.B82];[.E5])" office:value-type="currency" office:currency="USD" office:value="0" calcext:value-type="currency">
            <text:p>$0.00</text:p>
          </table:table-cell>
          <table:table-cell table:formula="of:=SUMIF([$Expenses.C3:.C82];[.A23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formula="of:=SUMIFS([$Expenses.E3:.E82];[$Expenses.C3:.C82];[.A24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4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4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4];[$Expenses.B3:.B82];[.E5])" office:value-type="currency" office:currency="USD" office:value="15" calcext:value-type="currency">
            <text:p>$15.00</text:p>
          </table:table-cell>
          <table:table-cell table:formula="of:=SUMIF([$Expenses.C3:.C82];[.A24];[$Expenses.E3:.E82])" office:value-type="currency" office:currency="USD" office:value="15" calcext:value-type="currency">
            <text:p>$15.00</text:p>
          </table:table-cell>
        </table:table-row>
        <table:table-row table:style-name="ro3">
          <table:table-cell office:value-type="string" calcext:value-type="string">
            <text:p>Drying &amp; storage</text:p>
          </table:table-cell>
          <table:table-cell table:formula="of:=SUMIFS([$Expenses.E3:.E82];[$Expenses.C3:.C82];[.A25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5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5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5];[$Expenses.B3:.B82];[.E5])" office:value-type="currency" office:currency="USD" office:value="0" calcext:value-type="currency">
            <text:p>$0.00</text:p>
          </table:table-cell>
          <table:table-cell table:formula="of:=SUMIF([$Expenses.C3:.C82];[.A25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Hauling / trucking</text:p>
          </table:table-cell>
          <table:table-cell table:formula="of:=SUMIFS([$Expenses.E3:.E82];[$Expenses.C3:.C82];[.A26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6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6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6];[$Expenses.B3:.B82];[.E5])" office:value-type="currency" office:currency="USD" office:value="0" calcext:value-type="currency">
            <text:p>$0.00</text:p>
          </table:table-cell>
          <table:table-cell table:formula="of:=SUMIF([$Expenses.C3:.C82];[.A26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Hired labor</text:p>
          </table:table-cell>
          <table:table-cell table:formula="of:=SUMIFS([$Expenses.E3:.E82];[$Expenses.C3:.C82];[.A27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7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7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7];[$Expenses.B3:.B82];[.E5])" office:value-type="currency" office:currency="USD" office:value="0" calcext:value-type="currency">
            <text:p>$0.00</text:p>
          </table:table-cell>
          <table:table-cell table:formula="of:=SUMIF([$Expenses.C3:.C82];[.A27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Land rent / lease</text:p>
          </table:table-cell>
          <table:table-cell table:formula="of:=SUMIFS([$Expenses.E3:.E82];[$Expenses.C3:.C82];[.A28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8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8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8];[$Expenses.B3:.B82];[.E5])" office:value-type="currency" office:currency="USD" office:value="0" calcext:value-type="currency">
            <text:p>$0.00</text:p>
          </table:table-cell>
          <table:table-cell table:formula="of:=SUMIF([$Expenses.C3:.C82];[.A28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Operating loan interest</text:p>
          </table:table-cell>
          <table:table-cell table:formula="of:=SUMIFS([$Expenses.E3:.E82];[$Expenses.C3:.C82];[.A29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29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29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29];[$Expenses.B3:.B82];[.E5])" office:value-type="currency" office:currency="USD" office:value="0" calcext:value-type="currency">
            <text:p>$0.00</text:p>
          </table:table-cell>
          <table:table-cell table:formula="of:=SUMIF([$Expenses.C3:.C82];[.A29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Supplies &amp; miscellaneous</text:p>
          </table:table-cell>
          <table:table-cell table:formula="of:=SUMIFS([$Expenses.E3:.E82];[$Expenses.C3:.C82];[.A30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0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0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30];[$Expenses.B3:.B82];[.E5])" office:value-type="currency" office:currency="USD" office:value="0" calcext:value-type="currency">
            <text:p>$0.00</text:p>
          </table:table-cell>
          <table:table-cell table:formula="of:=SUMIF([$Expenses.C3:.C82];[.A30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office:value-type="string" calcext:value-type="string">
            <text:p>TOTAL OPERATING EXPENSES</text:p>
          </table:table-cell>
          <table:table-cell table:style-name="ceCurTotal" table:formula="of:=SUM([.B18:.B30])" office:value-type="currency" office:currency="USD" office:value="2025" calcext:value-type="currency">
            <text:p>$2,025.00</text:p>
          </table:table-cell>
          <table:table-cell table:style-name="ceCurTotal" table:formula="of:=SUM([.C18:.C30])" office:value-type="currency" office:currency="USD" office:value="0" calcext:value-type="currency">
            <text:p>$0.00</text:p>
          </table:table-cell>
          <table:table-cell table:style-name="ceCurTotal" table:formula="of:=SUM([.D18:.D30])" office:value-type="currency" office:currency="USD" office:value="0" calcext:value-type="currency">
            <text:p>$0.00</text:p>
          </table:table-cell>
          <table:table-cell table:style-name="ceCurTotal" table:formula="of:=SUM([.E18:.E30])" office:value-type="currency" office:currency="USD" office:value="15" calcext:value-type="currency">
            <text:p>$15.00</text:p>
          </table:table-cell>
          <table:table-cell table:style-name="ceCurTotal" table:formula="of:=SUM([.F18:.F30])" office:value-type="currency" office:currency="USD" office:value="2040" calcext:value-type="currency">
            <text:p>$2,040.00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LabelBold" office:value-type="string" calcext:value-type="string">
            <text:p>GROSS MARGIN <text:s/>(Revenue − Operating)</text:p>
          </table:table-cell>
          <table:table-cell table:style-name="ceCurTotal" table:formula="of:=[.B15]-[.B31]" office:value-type="currency" office:currency="USD" office:value="-2025" calcext:value-type="currency">
            <text:p>($2,025.00)</text:p>
          </table:table-cell>
          <table:table-cell table:style-name="ceCurTotal" table:formula="of:=[.C15]-[.C31]" office:value-type="currency" office:currency="USD" office:value="0" calcext:value-type="currency">
            <text:p>$0.00</text:p>
          </table:table-cell>
          <table:table-cell table:style-name="ceCurTotal" table:formula="of:=[.D15]-[.D31]" office:value-type="currency" office:currency="USD" office:value="0" calcext:value-type="currency">
            <text:p>$0.00</text:p>
          </table:table-cell>
          <table:table-cell table:style-name="ceCurTotal" table:formula="of:=[.E15]-[.E31]" office:value-type="currency" office:currency="USD" office:value="-15" calcext:value-type="currency">
            <text:p>($15.00)</text:p>
          </table:table-cell>
          <table:table-cell table:style-name="ceCurTotal" table:formula="of:=[.F15]-[.F31]" office:value-type="currency" office:currency="USD" office:value="-2040" calcext:value-type="currency">
            <text:p>($2,040.00)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Section" office:value-type="string" calcext:value-type="string" table:number-columns-spanned="6" table:number-rows-spanned="1">
            <text:p>FIXED / OVERHEAD EXPENSES</text:p>
          </table:table-cell>
          <table:covered-table-cell table:number-columns-repeated="5" table:style-name="Default"/>
        </table:table-row>
        <table:table-row table:style-name="ro3">
          <table:table-cell office:value-type="string" calcext:value-type="string">
            <text:p>Property / land taxes</text:p>
          </table:table-cell>
          <table:table-cell table:formula="of:=SUMIFS([$Expenses.E3:.E82];[$Expenses.C3:.C82];[.A36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6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6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36];[$Expenses.B3:.B82];[.E5])" office:value-type="currency" office:currency="USD" office:value="0" calcext:value-type="currency">
            <text:p>$0.00</text:p>
          </table:table-cell>
          <table:table-cell table:formula="of:=SUMIF([$Expenses.C3:.C82];[.A36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Farm &amp; liability insurance</text:p>
          </table:table-cell>
          <table:table-cell table:formula="of:=SUMIFS([$Expenses.E3:.E82];[$Expenses.C3:.C82];[.A37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7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7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37];[$Expenses.B3:.B82];[.E5])" office:value-type="currency" office:currency="USD" office:value="0" calcext:value-type="currency">
            <text:p>$0.00</text:p>
          </table:table-cell>
          <table:table-cell table:formula="of:=SUMIF([$Expenses.C3:.C82];[.A37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Depreciation (equipment &amp; buildings)</text:p>
          </table:table-cell>
          <table:table-cell table:formula="of:=SUMIFS([$Expenses.E3:.E82];[$Expenses.C3:.C82];[.A38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8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8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38];[$Expenses.B3:.B82];[.E5])" office:value-type="currency" office:currency="USD" office:value="0" calcext:value-type="currency">
            <text:p>$0.00</text:p>
          </table:table-cell>
          <table:table-cell table:formula="of:=SUMIF([$Expenses.C3:.C82];[.A38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Term loan interest</text:p>
          </table:table-cell>
          <table:table-cell table:formula="of:=SUMIFS([$Expenses.E3:.E82];[$Expenses.C3:.C82];[.A39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39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39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39];[$Expenses.B3:.B82];[.E5])" office:value-type="currency" office:currency="USD" office:value="0" calcext:value-type="currency">
            <text:p>$0.00</text:p>
          </table:table-cell>
          <table:table-cell table:formula="of:=SUMIF([$Expenses.C3:.C82];[.A39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Other overhead</text:p>
          </table:table-cell>
          <table:table-cell table:formula="of:=SUMIFS([$Expenses.E3:.E82];[$Expenses.C3:.C82];[.A40];[$Expenses.B3:.B82];[.B5])" office:value-type="currency" office:currency="USD" office:value="0" calcext:value-type="currency">
            <text:p>$0.00</text:p>
          </table:table-cell>
          <table:table-cell table:formula="of:=SUMIFS([$Expenses.E3:.E82];[$Expenses.C3:.C82];[.A40];[$Expenses.B3:.B82];[.C5])" office:value-type="currency" office:currency="USD" office:value="0" calcext:value-type="currency">
            <text:p>$0.00</text:p>
          </table:table-cell>
          <table:table-cell table:formula="of:=SUMIFS([$Expenses.E3:.E82];[$Expenses.C3:.C82];[.A40];[$Expenses.B3:.B82];[.D5])" office:value-type="currency" office:currency="USD" office:value="0" calcext:value-type="currency">
            <text:p>$0.00</text:p>
          </table:table-cell>
          <table:table-cell table:formula="of:=SUMIFS([$Expenses.E3:.E82];[$Expenses.C3:.C82];[.A40];[$Expenses.B3:.B82];[.E5])" office:value-type="currency" office:currency="USD" office:value="0" calcext:value-type="currency">
            <text:p>$0.00</text:p>
          </table:table-cell>
          <table:table-cell table:formula="of:=SUMIF([$Expenses.C3:.C82];[.A40];[$Expenses.E3:.E82])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office:value-type="string" calcext:value-type="string">
            <text:p>TOTAL FIXED EXPENSES</text:p>
          </table:table-cell>
          <table:table-cell table:style-name="ceCurTotal" table:formula="of:=SUM([.B36:.B40])" office:value-type="currency" office:currency="USD" office:value="0" calcext:value-type="currency">
            <text:p>$0.00</text:p>
          </table:table-cell>
          <table:table-cell table:style-name="ceCurTotal" table:formula="of:=SUM([.C36:.C40])" office:value-type="currency" office:currency="USD" office:value="0" calcext:value-type="currency">
            <text:p>$0.00</text:p>
          </table:table-cell>
          <table:table-cell table:style-name="ceCurTotal" table:formula="of:=SUM([.D36:.D40])" office:value-type="currency" office:currency="USD" office:value="0" calcext:value-type="currency">
            <text:p>$0.00</text:p>
          </table:table-cell>
          <table:table-cell table:style-name="ceCurTotal" table:formula="of:=SUM([.E36:.E40])" office:value-type="currency" office:currency="USD" office:value="0" calcext:value-type="currency">
            <text:p>$0.00</text:p>
          </table:table-cell>
          <table:table-cell table:style-name="ceCurTotal" table:formula="of:=SUM([.F36:.F40])" office:value-type="currency" office:currency="USD" office:value="0" calcext:value-type="currency">
            <text:p>$0.00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4">
          <table:table-cell table:style-name="ceLabelNet" office:value-type="string" calcext:value-type="string">
            <text:p>NET PROFIT / (LOSS)</text:p>
          </table:table-cell>
          <table:table-cell table:style-name="ceCurNet" table:formula="of:=[.B15]-[.B31]-[.B41]" office:value-type="currency" office:currency="USD" office:value="-2025" calcext:value-type="currency">
            <text:p>($2,025.00)</text:p>
          </table:table-cell>
          <table:table-cell table:style-name="ceCurNet" table:formula="of:=[.C15]-[.C31]-[.C41]" office:value-type="currency" office:currency="USD" office:value="0" calcext:value-type="currency">
            <text:p>$0.00</text:p>
          </table:table-cell>
          <table:table-cell table:style-name="ceCurNet" table:formula="of:=[.D15]-[.D31]-[.D41]" office:value-type="currency" office:currency="USD" office:value="0" calcext:value-type="currency">
            <text:p>$0.00</text:p>
          </table:table-cell>
          <table:table-cell table:style-name="ceCurNet" table:formula="of:=[.E15]-[.E31]-[.E41]" office:value-type="currency" office:currency="USD" office:value="-15" calcext:value-type="currency">
            <text:p>($15.00)</text:p>
          </table:table-cell>
          <table:table-cell table:style-name="ceCurNet" table:formula="of:=[.F15]-[.F31]-[.F41]" office:value-type="currency" office:currency="USD" office:value="-2040" calcext:value-type="currency">
            <text:p>($2,040.00)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Section" office:value-type="string" calcext:value-type="string" table:number-columns-spanned="6" table:number-rows-spanned="1">
            <text:p>PER-ACRE METRICS</text:p>
          </table:table-cell>
          <table:covered-table-cell table:number-columns-repeated="5" table:style-name="Default"/>
        </table:table-row>
        <table:table-row table:style-name="ro3">
          <table:table-cell office:value-type="string" calcext:value-type="string">
            <text:p>Revenue per acre</text:p>
          </table:table-cell>
          <table:table-cell table:formula="of:=IF([.B7]=0;0;[.B15]/[.B7])" office:value-type="currency" office:currency="USD" office:value="0" calcext:value-type="currency">
            <text:p>$0.00</text:p>
          </table:table-cell>
          <table:table-cell table:formula="of:=IF([.C7]=0;0;[.C15]/[.C7])" office:value-type="currency" office:currency="USD" office:value="0" calcext:value-type="currency">
            <text:p>$0.00</text:p>
          </table:table-cell>
          <table:table-cell table:formula="of:=IF([.D7]=0;0;[.D15]/[.D7])" office:value-type="currency" office:currency="USD" office:value="0" calcext:value-type="currency">
            <text:p>$0.00</text:p>
          </table:table-cell>
          <table:table-cell table:formula="of:=IF([.E7]=0;0;[.E15]/[.E7])" office:value-type="currency" office:currency="USD" office:value="0" calcext:value-type="currency">
            <text:p>$0.00</text:p>
          </table:table-cell>
          <table:table-cell table:style-name="ceCur" table:formula="of:=IF([.F7]=0;0;[.F15]/[.F7])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Total cost per acre</text:p>
          </table:table-cell>
          <table:table-cell table:formula="of:=IF([.B7]=0;0;([.B31]+[.B41])/[.B7])" office:value-type="currency" office:currency="USD" office:value="77.8846153846154" calcext:value-type="currency">
            <text:p>$77.88</text:p>
          </table:table-cell>
          <table:table-cell table:formula="of:=IF([.C7]=0;0;([.C31]+[.C41])/[.C7])" office:value-type="currency" office:currency="USD" office:value="0" calcext:value-type="currency">
            <text:p>$0.00</text:p>
          </table:table-cell>
          <table:table-cell table:formula="of:=IF([.D7]=0;0;([.D31]+[.D41])/[.D7])" office:value-type="currency" office:currency="USD" office:value="0" calcext:value-type="currency">
            <text:p>$0.00</text:p>
          </table:table-cell>
          <table:table-cell table:formula="of:=IF([.E7]=0;0;([.E31]+[.E41])/[.E7])" office:value-type="currency" office:currency="USD" office:value="0" calcext:value-type="currency">
            <text:p>$0.00</text:p>
          </table:table-cell>
          <table:table-cell table:style-name="ceCur" table:formula="of:=IF([.F7]=0;0;([.F31]+[.F41])/[.F7])" office:value-type="currency" office:currency="USD" office:value="78.4615384615385" calcext:value-type="currency">
            <text:p>$78.46</text:p>
          </table:table-cell>
        </table:table-row>
        <table:table-row table:style-name="ro3">
          <table:table-cell office:value-type="string" calcext:value-type="string">
            <text:p>Profit per acre</text:p>
          </table:table-cell>
          <table:table-cell table:formula="of:=IF([.B7]=0;0;[.B43]/[.B7])" office:value-type="currency" office:currency="USD" office:value="-77.8846153846154" calcext:value-type="currency">
            <text:p>($77.88)</text:p>
          </table:table-cell>
          <table:table-cell table:formula="of:=IF([.C7]=0;0;[.C43]/[.C7])" office:value-type="currency" office:currency="USD" office:value="0" calcext:value-type="currency">
            <text:p>$0.00</text:p>
          </table:table-cell>
          <table:table-cell table:formula="of:=IF([.D7]=0;0;[.D43]/[.D7])" office:value-type="currency" office:currency="USD" office:value="0" calcext:value-type="currency">
            <text:p>$0.00</text:p>
          </table:table-cell>
          <table:table-cell table:formula="of:=IF([.E7]=0;0;[.E43]/[.E7])" office:value-type="currency" office:currency="USD" office:value="0" calcext:value-type="currency">
            <text:p>$0.00</text:p>
          </table:table-cell>
          <table:table-cell table:style-name="ceCur" table:formula="of:=IF([.F7]=0;0;[.F43]/[.F7])" office:value-type="currency" office:currency="USD" office:value="-78.4615384615385" calcext:value-type="currency">
            <text:p>($78.46)</text:p>
          </table:table-cell>
        </table:table-row>
        <table:table-row table:style-name="ro3">
          <table:table-cell office:value-type="string" calcext:value-type="string">
            <text:p>Breakeven price per unit</text:p>
          </table:table-cell>
          <table:table-cell table:formula="of:=IF([.B8]=0;0;([.B31]+[.B41])/[.B8])" office:value-type="currency" office:currency="USD" office:value="0" calcext:value-type="currency">
            <text:p>$0.00</text:p>
          </table:table-cell>
          <table:table-cell table:formula="of:=IF([.C8]=0;0;([.C31]+[.C41])/[.C8])" office:value-type="currency" office:currency="USD" office:value="0" calcext:value-type="currency">
            <text:p>$0.00</text:p>
          </table:table-cell>
          <table:table-cell table:formula="of:=IF([.D8]=0;0;([.D31]+[.D41])/[.D8])" office:value-type="currency" office:currency="USD" office:value="0" calcext:value-type="currency">
            <text:p>$0.00</text:p>
          </table:table-cell>
          <table:table-cell table:formula="of:=IF([.E8]=0;0;([.E31]+[.E41])/[.E8])" office:value-type="currency" office:currency="USD" office:value="0" calcext:value-type="currency">
            <text:p>$0.00</text:p>
          </table:table-cell>
          <table:table-cell table:style-name="ceCur"/>
        </table:table-row>
      </table:table>
      <table:table table:name="Sales" table:style-name="ta1">
        <table:table-column table:style-name="co4" table:default-cell-style-name="ceDateInput"/>
        <table:table-column table:style-name="co5" table:number-columns-repeated="2" table:default-cell-style-name="ceTextInput"/>
        <table:table-column table:style-name="co6" table:default-cell-style-name="ceNumInput"/>
        <table:table-column table:style-name="co2" table:default-cell-style-name="ceCurInput"/>
        <table:table-column table:style-name="co2" table:default-cell-style-name="ceCur"/>
        <table:table-column table:style-name="co7" table:default-cell-style-name="ceTextInput"/>
        <table:table-column table:style-name="co3" table:default-cell-style-name="Default"/>
        <table:table-row table:style-name="ro1">
          <table:table-cell table:style-name="ceTitle" office:value-type="string" calcext:value-type="string" table:number-columns-spanned="7" table:number-rows-spanned="1">
            <text:p>Sales Log — 2026</text:p>
          </table:table-cell>
          <table:covered-table-cell table:number-columns-repeated="6" table:style-name="Default"/>
          <table:table-cell table:style-name="ceNoteHelp" office:value-type="string" calcext:value-type="string">
            <text:p>▼ Crop list (do not delete)</text:p>
          </table:table-cell>
        </table:table-row>
        <table:table-row table:style-name="ro3">
          <table:table-cell table:style-name="ceHead" office:value-type="string" calcext:value-type="string">
            <text:p>Date</text:p>
          </table:table-cell>
          <table:table-cell table:style-name="ceHead" office:value-type="string" calcext:value-type="string">
            <text:p>Crop</text:p>
          </table:table-cell>
          <table:table-cell table:style-name="ceHead" office:value-type="string" calcext:value-type="string">
            <text:p>Buyer / Market</text:p>
          </table:table-cell>
          <table:table-cell table:style-name="ceHead" office:value-type="string" calcext:value-type="string">
            <text:p>Quantity (units)</text:p>
          </table:table-cell>
          <table:table-cell table:style-name="ceHead" office:value-type="string" calcext:value-type="string">
            <text:p>Price / unit ($)</text:p>
          </table:table-cell>
          <table:table-cell table:style-name="ceHead" office:value-type="string" calcext:value-type="string">
            <text:p>Amount ($)</text:p>
          </table:table-cell>
          <table:table-cell table:style-name="ceHead" office:value-type="string" calcext:value-type="string">
            <text:p>Notes</text:p>
          </table:table-cell>
          <table:table-cell table:style-name="ceHelp" table:formula="of:=[$'P&amp;L'.B5]" office:value-type="string" office:string-value="Soybeans" calcext:value-type="string">
            <text:p>Soybeans</text:p>
          </table:table-cell>
        </table:table-row>
        <table:table-row table:style-name="ro3">
          <table:table-cell/>
          <table:table-cell office:value-type="string" calcext:value-type="string">
            <text:p>Soybeans</text:p>
          </table:table-cell>
          <table:table-cell table:number-columns-repeated="3"/>
          <table:table-cell table:formula="of:=[.D3]*[.E3]" office:value-type="currency" office:currency="USD" office:value="0" calcext:value-type="currency">
            <text:p>$0.00</text:p>
          </table:table-cell>
          <table:table-cell/>
          <table:table-cell table:style-name="ceHelp" table:formula="of:=[$'P&amp;L'.C5]" office:value-type="string" office:string-value="Corn" calcext:value-type="string">
            <text:p>Corn</text:p>
          </table:table-cell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]*[.E4]" office:value-type="currency" office:currency="USD" office:value="0" calcext:value-type="currency">
            <text:p>$0.00</text:p>
          </table:table-cell>
          <table:table-cell/>
          <table:table-cell table:style-name="ceHelp" table:formula="of:=[$'P&amp;L'.D5]" office:value-type="string" office:string-value="Hay" calcext:value-type="string">
            <text:p>Hay</text:p>
          </table:table-cell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]*[.E5]" office:value-type="currency" office:currency="USD" office:value="0" calcext:value-type="currency">
            <text:p>$0.00</text:p>
          </table:table-cell>
          <table:table-cell/>
          <table:table-cell table:style-name="ceHelp" table:formula="of:=[$'P&amp;L'.E5]" office:value-type="string" office:string-value="No Crop" calcext:value-type="string">
            <text:p>No Crop</text:p>
          </table:table-cell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]*[.E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7]*[.E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8]*[.E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9]*[.E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0]*[.E1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1]*[.E1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2]*[.E1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3]*[.E1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4]*[.E1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5]*[.E1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6]*[.E1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7]*[.E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8]*[.E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19]*[.E1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0]*[.E2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1]*[.E2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2]*[.E2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3]*[.E2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4]*[.E2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5]*[.E2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6]*[.E2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7]*[.E2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8]*[.E2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29]*[.E2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0]*[.E3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1]*[.E3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2]*[.E3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3]*[.E3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4]*[.E3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5]*[.E3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6]*[.E3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7]*[.E3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8]*[.E3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39]*[.E3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0]*[.E4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1]*[.E4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2]*[.E4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3]*[.E4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4]*[.E4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5]*[.E4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6]*[.E4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7]*[.E4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8]*[.E4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49]*[.E4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0]*[.E5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1]*[.E5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2]*[.E5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3]*[.E5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4]*[.E5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5]*[.E5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6]*[.E5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7]*[.E5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8]*[.E5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59]*[.E5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0]*[.E6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1]*[.E6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/>
          <table:table-cell table:content-validation-name="val1"/>
          <table:table-cell table:number-columns-repeated="3"/>
          <table:table-cell table:formula="of:=[.D62]*[.E6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 table:style-name="Default" table:number-columns-repeated="2"/>
          <table:table-cell table:style-name="ceLabelBold" office:value-type="string" calcext:value-type="string">
            <text:p>TOTAL SALES</text:p>
          </table:table-cell>
          <table:table-cell table:style-name="Default" table:number-columns-repeated="2"/>
          <table:table-cell table:style-name="ceCurTotal" table:formula="of:=SUM([.F3:.F62])" office:value-type="currency" office:currency="USD" office:value="0" calcext:value-type="currency">
            <text:p>$0.00</text:p>
          </table:table-cell>
          <table:table-cell table:style-name="Default"/>
          <table:table-cell/>
        </table:table-row>
      </table:table>
      <table:table table:name="Expenses" table:style-name="ta1">
        <table:table-column table:style-name="co4" table:default-cell-style-name="ceDateInput"/>
        <table:table-column table:style-name="co5" table:default-cell-style-name="ceTextInput"/>
        <table:table-column table:style-name="co1" table:default-cell-style-name="ceTextInput"/>
        <table:table-column table:style-name="co5" table:default-cell-style-name="ceTextInput"/>
        <table:table-column table:style-name="co2" table:default-cell-style-name="ceCurInput"/>
        <table:table-column table:style-name="co7" table:default-cell-style-name="ceTextInput"/>
        <table:table-column table:style-name="co3" table:default-cell-style-name="Default"/>
        <table:table-row table:style-name="ro1">
          <table:table-cell table:style-name="ceTitle" office:value-type="string" calcext:value-type="string" table:number-columns-spanned="6" table:number-rows-spanned="1">
            <text:p>Expense Log — 2026</text:p>
          </table:table-cell>
          <table:covered-table-cell table:number-columns-repeated="5" table:style-name="Default"/>
          <table:table-cell table:style-name="ceNoteHelp" office:value-type="string" calcext:value-type="string">
            <text:p>▼ Crop list (do not delete)</text:p>
          </table:table-cell>
        </table:table-row>
        <table:table-row table:style-name="ro3">
          <table:table-cell table:style-name="ceHead" office:value-type="string" calcext:value-type="string">
            <text:p>Date</text:p>
          </table:table-cell>
          <table:table-cell table:style-name="ceHead" office:value-type="string" calcext:value-type="string">
            <text:p>Crop</text:p>
          </table:table-cell>
          <table:table-cell table:style-name="ceHead" office:value-type="string" calcext:value-type="string">
            <text:p>Category</text:p>
          </table:table-cell>
          <table:table-cell table:style-name="ceHead" office:value-type="string" calcext:value-type="string">
            <text:p>Vendor</text:p>
          </table:table-cell>
          <table:table-cell table:style-name="ceHead" office:value-type="string" calcext:value-type="string">
            <text:p>Amount ($)</text:p>
          </table:table-cell>
          <table:table-cell table:style-name="ceHead" office:value-type="string" calcext:value-type="string">
            <text:p>Notes</text:p>
          </table:table-cell>
          <table:table-cell table:style-name="ceHelp" table:formula="of:=[$'P&amp;L'.B5]" office:value-type="string" office:string-value="Soybeans" calcext:value-type="string">
            <text:p>Soybeans</text:p>
          </table:table-cell>
        </table:table-row>
        <table:table-row table:style-name="ro3">
          <table:table-cell office:value-type="date" office:date-value="2026-06-06" calcext:value-type="date">
            <text:p>2026-06-06</text:p>
          </table:table-cell>
          <table:table-cell office:value-type="string" calcext:value-type="string">
            <text:p>Soybean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Troy Crispen</text:p>
          </table:table-cell>
          <table:table-cell office:value-type="currency" office:currency="USD" office:value="900" calcext:value-type="currency">
            <text:p>$900.00</text:p>
          </table:table-cell>
          <table:table-cell office:value-type="string" calcext:value-type="string">
            <text:p>Planted 06/04/26 Whiteside Road</text:p>
          </table:table-cell>
          <table:table-cell table:style-name="ceHelp" table:formula="of:=[$'P&amp;L'.C5]" office:value-type="string" office:string-value="Corn" calcext:value-type="string">
            <text:p>Corn</text:p>
          </table:table-cell>
        </table:table-row>
        <table:table-row table:style-name="ro3">
          <table:table-cell office:value-type="date" office:date-value="2026-06-06" calcext:value-type="date">
            <text:p>2026-06-06</text:p>
          </table:table-cell>
          <table:table-cell office:value-type="string" calcext:value-type="string">
            <text:p>Soybean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Troy Crispen</text:p>
          </table:table-cell>
          <table:table-cell office:value-type="currency" office:currency="USD" office:value="1125" calcext:value-type="currency">
            <text:p>$1,125.00</text:p>
          </table:table-cell>
          <table:table-cell office:value-type="string" calcext:value-type="string">
            <text:p>Planted 06/06/26 Straub Road</text:p>
          </table:table-cell>
          <table:table-cell table:style-name="ceHelp" table:formula="of:=[$'P&amp;L'.D5]" office:value-type="string" office:string-value="Hay" calcext:value-type="string">
            <text:p>Hay</text:p>
          </table:table-cell>
        </table:table-row>
        <table:table-row table:style-name="ro3">
          <table:table-cell office:value-type="date" office:date-value="2026-06-06" calcext:value-type="date">
            <text:p>2026-06-06</text:p>
          </table:table-cell>
          <table:table-cell office:value-type="string" calcext:value-type="string">
            <text:p>No Crop</text:p>
          </table:table-cell>
          <table:table-cell office:value-type="string" calcext:value-type="string">
            <text:p>Repairs &amp; maintenance</text:p>
          </table:table-cell>
          <table:table-cell office:value-type="string" calcext:value-type="string">
            <text:p>Troy Crispen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Power Steering Hose</text:p>
          </table:table-cell>
          <table:table-cell table:style-name="ceHelp" table:formula="of:=[$'P&amp;L'.E5]" office:value-type="string" office:string-value="No Crop" calcext:value-type="string">
            <text:p>No Crop</text:p>
          </table:table-cell>
        </table:table-row>
        <table:table-row table:style-name="ro3" table:number-rows-repeated="77">
          <table:table-cell/>
          <table:table-cell table:content-validation-name="val2"/>
          <table:table-cell table:content-validation-name="val3"/>
          <table:table-cell table:number-columns-repeated="4"/>
        </table:table-row>
        <table:table-row table:style-name="ro3">
          <table:table-cell table:style-name="Default" table:number-columns-repeated="2"/>
          <table:table-cell table:style-name="ceLabelBold" office:value-type="string" calcext:value-type="string">
            <text:p>TOTAL EXPENSES</text:p>
          </table:table-cell>
          <table:table-cell table:style-name="Default"/>
          <table:table-cell table:style-name="ceCurTotal" table:formula="of:=SUM([.E3:.E82])" office:value-type="currency" office:currency="USD" office:value="2040" calcext:value-type="currency">
            <text:p>$2,040.00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ceSection" office:value-type="string" calcext:value-type="string" table:number-columns-spanned="6" table:number-rows-spanned="1">
            <text:p>COST-CAPTURE CHECK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Default" table:number-columns-repeated="2"/>
          <table:table-cell table:style-name="ceLabelBold" office:value-type="string" calcext:value-type="string">
            <text:p>Captured by the P&amp;L expense lines</text:p>
          </table:table-cell>
          <table:table-cell table:style-name="Default"/>
          <table:table-cell table:style-name="ceCurTotalLite" table:formula="of:=[$'P&amp;L'.F31]+[$'P&amp;L'.F41]" office:value-type="currency" office:currency="USD" office:value="2040" calcext:value-type="currency">
            <text:p>$2,040.00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2"/>
          <table:table-cell table:style-name="ceLabelBold" office:value-type="string" calcext:value-type="string">
            <text:p>Unmatched vs logged total — should be $0</text:p>
          </table:table-cell>
          <table:table-cell table:style-name="Default"/>
          <table:table-cell table:style-name="ceCurTotal" table:formula="of:=[.E83]-[.E86]" office:value-type="currency" office:currency="USD" office:value="0" calcext:value-type="currency">
            <text:p>$0.00</text:p>
          </table:table-cell>
          <table:table-cell table:style-name="Default"/>
          <table:table-cell/>
        </table:table-row>
        <table:table-row table:style-name="ro3">
          <table:table-cell table:style-name="ceNote" office:value-type="string" calcext:value-type="string" table:number-columns-spanned="6" table:number-rows-spanned="1">
            <text:p>If “Unmatched” is not $0, a logged cost has a Category that is not one of the P&amp;L expense lines, so the farm totals are not counting it — fix that row’s Category.</text:p>
          </table:table-cell>
          <table:covered-table-cell table:number-columns-repeated="5" table:style-name="Default"/>
          <table:table-cell/>
        </table:table-row>
      </table:table>
      <table:table table:name="Assets &amp; Depreciation" table:style-name="ta1">
        <table:table-column table:style-name="co1" table:default-cell-style-name="ceTextInput"/>
        <table:table-column table:style-name="co4" table:default-cell-style-name="ceDateInput"/>
        <table:table-column table:style-name="co2" table:number-columns-repeated="2" table:default-cell-style-name="ceCurInput"/>
        <table:table-column table:style-name="co6" table:default-cell-style-name="ceNumInput"/>
        <table:table-column table:style-name="co2" table:default-cell-style-name="ceCur"/>
        <table:table-column table:style-name="co2" table:default-cell-style-name="ceCurInput"/>
        <table:table-row table:style-name="ro1">
          <table:table-cell table:style-name="ceTitle" office:value-type="string" calcext:value-type="string" table:number-columns-spanned="7" table:number-rows-spanned="1">
            <text:p>Assets &amp; Depreciation (straight-line)</text:p>
          </table:table-cell>
          <table:covered-table-cell table:number-columns-repeated="6" table:style-name="Default"/>
        </table:table-row>
        <table:table-row table:style-name="ro3">
          <table:table-cell table:style-name="ceNote" office:value-type="string" calcext:value-type="string" table:number-columns-spanned="7" table:number-rows-spanned="1">
            <text:p>Annual depreciation = (Cost − Salvage) ÷ Useful life. Log the TOTAL below as a “Depreciation” expense in the Expenses tab.</text:p>
          </table:table-cell>
          <table:covered-table-cell table:number-columns-repeated="6" table:style-name="Default"/>
        </table:table-row>
        <table:table-row table:style-name="ro3">
          <table:table-cell table:style-name="ceHead" office:value-type="string" calcext:value-type="string">
            <text:p>Item / Equipment</text:p>
          </table:table-cell>
          <table:table-cell table:style-name="ceHead" office:value-type="string" calcext:value-type="string">
            <text:p>Purchase date</text:p>
          </table:table-cell>
          <table:table-cell table:style-name="ceHead" office:value-type="string" calcext:value-type="string">
            <text:p>Cost ($)</text:p>
          </table:table-cell>
          <table:table-cell table:style-name="ceHead" office:value-type="string" calcext:value-type="string">
            <text:p>Salvage value ($)</text:p>
          </table:table-cell>
          <table:table-cell table:style-name="ceHead" office:value-type="string" calcext:value-type="string">
            <text:p>Useful life (yrs)</text:p>
          </table:table-cell>
          <table:table-cell table:style-name="ceHead" office:value-type="string" calcext:value-type="string">
            <text:p>Annual depreciation ($)</text:p>
          </table:table-cell>
          <table:table-cell table:style-name="ceHead" office:value-type="string" calcext:value-type="string">
            <text:p>Accumulated to date ($)</text:p>
          </table:table-cell>
        </table:table-row>
        <table:table-row table:style-name="ro3">
          <table:table-cell table:number-columns-repeated="5"/>
          <table:table-cell table:formula="of:=IF([.E4]=0;0;([.C4]-[.D4])/[.E4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5]=0;0;([.C5]-[.D5])/[.E5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6]=0;0;([.C6]-[.D6])/[.E6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7]=0;0;([.C7]-[.D7])/[.E7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8]=0;0;([.C8]-[.D8])/[.E8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9]=0;0;([.C9]-[.D9])/[.E9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0]=0;0;([.C10]-[.D10])/[.E10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1]=0;0;([.C11]-[.D11])/[.E11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2]=0;0;([.C12]-[.D12])/[.E12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3]=0;0;([.C13]-[.D13])/[.E13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4]=0;0;([.C14]-[.D14])/[.E14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5]=0;0;([.C15]-[.D15])/[.E15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6]=0;0;([.C16]-[.D16])/[.E16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7]=0;0;([.C17]-[.D17])/[.E17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8]=0;0;([.C18]-[.D18])/[.E18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19]=0;0;([.C19]-[.D19])/[.E19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0]=0;0;([.C20]-[.D20])/[.E20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1]=0;0;([.C21]-[.D21])/[.E21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2]=0;0;([.C22]-[.D22])/[.E22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number-columns-repeated="5"/>
          <table:table-cell table:formula="of:=IF([.E23]=0;0;([.C23]-[.D23])/[.E23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 table:style-name="ceLabelBold" office:value-type="string" calcext:value-type="string">
            <text:p>TOTAL ANNUAL DEPRECIATION</text:p>
          </table:table-cell>
          <table:table-cell table:style-name="Default" table:number-columns-repeated="4"/>
          <table:table-cell table:style-name="ceCurTotal" table:formula="of:=SUM([.F4:.F23])" office:value-type="currency" office:currency="USD" office:value="0" calcext:value-type="currency">
            <text:p>$0.00</text:p>
          </table:table-cell>
          <table:table-cell table:style-name="ceCurTotal" table:formula="of:=SUM([.G4:.G23])" office:value-type="currency" office:currency="USD" office:value="0" calcext:value-type="currency">
            <text:p>$0.00</text:p>
          </table:table-cell>
        </table:table-row>
      </table:table>
      <table:table table:name="Summary" table:style-name="ta1">
        <table:table-column table:style-name="co1" table:default-cell-style-name="Default"/>
        <table:table-column table:style-name="co2" table:default-cell-style-name="ceCur"/>
        <table:table-column table:style-name="co2" table:number-columns-repeated="3" table:default-cell-style-name="Default"/>
        <table:table-row table:style-name="ro1">
          <table:table-cell table:style-name="ceTitle" office:value-type="string" calcext:value-type="string" table:number-columns-spanned="5" table:number-rows-spanned="1">
            <text:p>2026 Farm Summary — Dashboard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table:style-name="ceNote" office:value-type="string" calcext:value-type="string" table:number-columns-spanned="5" table:number-rows-spanned="1">
            <text:p>Live snapshot pulled from the P&amp;L tab.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Section" office:value-type="string" calcext:value-type="string" table:number-columns-spanned="5" table:number-rows-spanned="1">
            <text:p>WHOLE-FARM TOTALS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office:value-type="string" calcext:value-type="string">
            <text:p>Total revenue</text:p>
          </table:table-cell>
          <table:table-cell table:formula="of:=[$'P&amp;L'.F15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 operating expenses</text:p>
          </table:table-cell>
          <table:table-cell table:formula="of:=[$'P&amp;L'.F31]" office:value-type="currency" office:currency="USD" office:value="2040" calcext:value-type="currency">
            <text:p>$2,04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 fixed expenses</text:p>
          </table:table-cell>
          <table:table-cell table:formula="of:=[$'P&amp;L'.F41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4">
          <table:table-cell table:style-name="ceLabelNet" office:value-type="string" calcext:value-type="string">
            <text:p>Net profit / (loss)</text:p>
          </table:table-cell>
          <table:table-cell table:style-name="ceCurNet" table:formula="of:=[$'P&amp;L'.F43]" office:value-type="currency" office:currency="USD" office:value="-2040" calcext:value-type="currency">
            <text:p>($2,040.00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fit margin</text:p>
          </table:table-cell>
          <table:table-cell table:style-name="cePct" table:formula="of:=IF([$'P&amp;L'.F15]=0;0;[$'P&amp;L'.F43]/[$'P&amp;L'.F15])" office:value-type="percentage" office:value="0" calcext:value-type="percentage">
            <text:p>0.0%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Section" office:value-type="string" calcext:value-type="string" table:number-columns-spanned="5" table:number-rows-spanned="1">
            <text:p>PRODUCTIVITY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office:value-type="string" calcext:value-type="string">
            <text:p>Total acres planted</text:p>
          </table:table-cell>
          <table:table-cell table:style-name="ceNum" table:formula="of:=[$'P&amp;L'.F7]" office:value-type="float" office:value="26" calcext:value-type="float">
            <text:p>26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venue per acre</text:p>
          </table:table-cell>
          <table:table-cell table:formula="of:=[$'P&amp;L'.F46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 cost per acre</text:p>
          </table:table-cell>
          <table:table-cell table:formula="of:=[$'P&amp;L'.F47]" office:value-type="currency" office:currency="USD" office:value="78.4615384615385" calcext:value-type="currency">
            <text:p>$78.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fit per acre</text:p>
          </table:table-cell>
          <table:table-cell table:formula="of:=[$'P&amp;L'.F48]" office:value-type="currency" office:currency="USD" office:value="-78.4615384615385" calcext:value-type="currency">
            <text:p>($78.46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Section" office:value-type="string" calcext:value-type="string" table:number-columns-spanned="5" table:number-rows-spanned="1">
            <text:p>BY CROP</text:p>
          </table:table-cell>
          <table:covered-table-cell table:style-name="Default"/>
          <table:covered-table-cell table:number-columns-repeated="3"/>
        </table:table-row>
        <table:table-row table:style-name="ro3">
          <table:table-cell table:style-name="ceHeadL" office:value-type="string" calcext:value-type="string">
            <text:p>Crop</text:p>
          </table:table-cell>
          <table:table-cell table:style-name="ceHead" office:value-type="string" calcext:value-type="string">
            <text:p>Revenue</text:p>
          </table:table-cell>
          <table:table-cell table:style-name="ceHead" office:value-type="string" calcext:value-type="string">
            <text:p>Total cost</text:p>
          </table:table-cell>
          <table:table-cell table:style-name="ceHead" office:value-type="string" calcext:value-type="string">
            <text:p>Net profit</text:p>
          </table:table-cell>
          <table:table-cell table:style-name="ceHead" office:value-type="string" calcext:value-type="string">
            <text:p>Profit / acre</text:p>
          </table:table-cell>
        </table:table-row>
        <table:table-row table:style-name="ro3">
          <table:table-cell table:style-name="ceLabelBold" table:formula="of:=[$'P&amp;L'.B5]" office:value-type="string" office:string-value="Soybeans" calcext:value-type="string">
            <text:p>Soybeans</text:p>
          </table:table-cell>
          <table:table-cell table:formula="of:=[$'P&amp;L'.B15]" office:value-type="currency" office:currency="USD" office:value="0" calcext:value-type="currency">
            <text:p>$0.00</text:p>
          </table:table-cell>
          <table:table-cell table:style-name="ceCur" table:formula="of:=[$'P&amp;L'.B31]+[$'P&amp;L'.B41]" office:value-type="currency" office:currency="USD" office:value="2025" calcext:value-type="currency">
            <text:p>$2,025.00</text:p>
          </table:table-cell>
          <table:table-cell table:style-name="ceCurTotalLite" table:formula="of:=[$'P&amp;L'.B43]" office:value-type="currency" office:currency="USD" office:value="-2025" calcext:value-type="currency">
            <text:p>($2,025.00)</text:p>
          </table:table-cell>
          <table:table-cell table:style-name="ceCur" table:formula="of:=[$'P&amp;L'.B48]" office:value-type="currency" office:currency="USD" office:value="-77.8846153846154" calcext:value-type="currency">
            <text:p>($77.88)</text:p>
          </table:table-cell>
        </table:table-row>
        <table:table-row table:style-name="ro3">
          <table:table-cell table:style-name="ceLabelBold" table:formula="of:=[$'P&amp;L'.C5]" office:value-type="string" office:string-value="Corn" calcext:value-type="string">
            <text:p>Corn</text:p>
          </table:table-cell>
          <table:table-cell table:formula="of:=[$'P&amp;L'.C15]" office:value-type="currency" office:currency="USD" office:value="0" calcext:value-type="currency">
            <text:p>$0.00</text:p>
          </table:table-cell>
          <table:table-cell table:style-name="ceCur" table:formula="of:=[$'P&amp;L'.C31]+[$'P&amp;L'.C41]" office:value-type="currency" office:currency="USD" office:value="0" calcext:value-type="currency">
            <text:p>$0.00</text:p>
          </table:table-cell>
          <table:table-cell table:style-name="ceCurTotalLite" table:formula="of:=[$'P&amp;L'.C43]" office:value-type="currency" office:currency="USD" office:value="0" calcext:value-type="currency">
            <text:p>$0.00</text:p>
          </table:table-cell>
          <table:table-cell table:style-name="ceCur" table:formula="of:=[$'P&amp;L'.C48]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table:formula="of:=[$'P&amp;L'.D5]" office:value-type="string" office:string-value="Hay" calcext:value-type="string">
            <text:p>Hay</text:p>
          </table:table-cell>
          <table:table-cell table:formula="of:=[$'P&amp;L'.D15]" office:value-type="currency" office:currency="USD" office:value="0" calcext:value-type="currency">
            <text:p>$0.00</text:p>
          </table:table-cell>
          <table:table-cell table:style-name="ceCur" table:formula="of:=[$'P&amp;L'.D31]+[$'P&amp;L'.D41]" office:value-type="currency" office:currency="USD" office:value="0" calcext:value-type="currency">
            <text:p>$0.00</text:p>
          </table:table-cell>
          <table:table-cell table:style-name="ceCurTotalLite" table:formula="of:=[$'P&amp;L'.D43]" office:value-type="currency" office:currency="USD" office:value="0" calcext:value-type="currency">
            <text:p>$0.00</text:p>
          </table:table-cell>
          <table:table-cell table:style-name="ceCur" table:formula="of:=[$'P&amp;L'.D48]" office:value-type="currency" office:currency="USD" office:value="0" calcext:value-type="currency">
            <text:p>$0.00</text:p>
          </table:table-cell>
        </table:table-row>
        <table:table-row table:style-name="ro3">
          <table:table-cell table:style-name="ceLabelBold" table:formula="of:=[$'P&amp;L'.E5]" office:value-type="string" office:string-value="No Crop" calcext:value-type="string">
            <text:p>No Crop</text:p>
          </table:table-cell>
          <table:table-cell table:formula="of:=[$'P&amp;L'.E15]" office:value-type="currency" office:currency="USD" office:value="0" calcext:value-type="currency">
            <text:p>$0.00</text:p>
          </table:table-cell>
          <table:table-cell table:style-name="ceCur" table:formula="of:=[$'P&amp;L'.E31]+[$'P&amp;L'.E41]" office:value-type="currency" office:currency="USD" office:value="15" calcext:value-type="currency">
            <text:p>$15.00</text:p>
          </table:table-cell>
          <table:table-cell table:style-name="ceCurTotalLite" table:formula="of:=[$'P&amp;L'.E43]" office:value-type="currency" office:currency="USD" office:value="-15" calcext:value-type="currency">
            <text:p>($15.00)</text:p>
          </table:table-cell>
          <table:table-cell table:style-name="ceCur" table:formula="of:=[$'P&amp;L'.E48]" office:value-type="currency" office:currency="USD" office:value="0" calcext:value-type="currency">
            <text:p>$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</number:currency-style>
    <number:currency-style style:name="N130">
      <number:currency-symbol number:language="en" number:country="US">$</number:currency-symbol>
      <number:number number:decimal-places="2" number:min-decimal-places="2" number:min-integer-digits="1" number:grouping="true"/>
      <style:map style:condition="value()&lt;0" style:apply-style-name="N130P0"/>
    </number:currency-style>
    <number:percentage-style style:name="N13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2026 Farming Ventures - Costs &amp; Profits</dc:title>
    <dc:date>2026-06-08T11:38:16.571114084</dc:date>
    <meta:editing-duration>PT16S</meta:editing-duration>
    <meta:editing-cycles>1</meta:editing-cycles>
    <meta:document-statistic meta:table-count="5" meta:cell-count="387" meta:object-count="0"/>
    <meta:generator>LibreOffice/26.2.3.2$Linux_X86_64 LibreOffice_project/620$Build-2</meta:generator>
  </office:meta>
</office:document-meta>
</file>